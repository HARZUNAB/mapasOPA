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5.625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4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5" style:family="paragraph" style:parent-style-name="Preformatted_20_Text" style:list-style-name="L6">
      <style:paragraph-properties fo:margin-left="0in" fo:margin-right="0in" fo:margin-top="0in" fo:margin-bottom="0in" style:contextual-spacing="false" fo:line-height="114%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7" style:family="paragraph" style:parent-style-name="Preformatted_20_Text">
      <style:paragraph-properties fo:margin-top="0in" fo:margin-bottom="0in" style:contextual-spacing="false" fo:line-height="114%"/>
    </style:style>
    <style:style style:name="P8" style:family="paragraph" style:parent-style-name="Preformatted_20_Text" style:list-style-name="L7">
      <style:paragraph-properties fo:margin-left="0in" fo:margin-right="0in" fo:margin-top="0in" fo:margin-bottom="0in" style:contextual-spacing="false" fo:line-height="114%" fo:text-indent="0in" style:auto-text-indent="false" fo:padding="0in" fo:border="none"/>
    </style:style>
    <style:style style:name="P9" style:family="paragraph" style:parent-style-name="Quotations">
      <style:paragraph-properties fo:margin-left="0.3937in" fo:margin-right="0.3937in" fo:margin-top="0in" fo:margin-bottom="0.1965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6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8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9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0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2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3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5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6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7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8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style:font-name="Google Sans"/>
    </style:style>
    <style:style style:name="T6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e Técnico de Proyecto: Sistema de Ploteo Sismotectónico Dinámico (NewPT)</text:h>
      <text:h text:style-name="P2" text:outline-level="2">1. Arquitectura General y Flujo de Trabajo</text:h>
      <text:p text:style-name="P13"><text:span text:style-name="T2">El sistema automatiza la extracción, procesamiento y graficación tridimensional (planta y perfil) de parámetros sísmicos en tiempo real tras ser invocado por el sistema de adquisición </text:span><text:span text:style-name="T3">SeisComP</text:span><text:span text:style-name="T2"> (módulo </text:span><text:span text:style-name="Source_20_Text"><text:span text:style-name="T2">scolv</text:span></text:span><text:span text:style-name="T2">).</text:span></text:p>
      <text:p text:style-name="P21">El flujo lógico opera secuencialmente de la siguiente manera:</text:p>
      <text:list text:style-name="L1">
        <text:list-item>
          <text:p text:style-name="P14"><text:bookmark text:name="p-rc_682cdc62ea7ae8d3-96"/><text:span text:style-name="T3">Invocación:</text:span><text:span text:style-name="T2"> El operador presiona el botón configurado en </text:span><text:span text:style-name="Source_20_Text"><text:span text:style-name="T2">scolv</text:span></text:span><text:span text:style-name="T2">, gatillando el script de Bash </text:span><text:span text:style-name="Source_20_Text"><text:span text:style-name="T2">newpt.sh</text:span></text:span><text:span text:style-name="T2"> y pasándole como argumento el ID único del evento (</text:span><text:span text:style-name="Source_20_Text"><text:span text:style-name="T2">EVENT_ID</text:span></text:span><text:span text:style-name="T2"> o </text:span><text:span text:style-name="Source_20_Text"><text:span text:style-name="T2">OriginID</text:span></text:span><text:span text:style-name="T2">). </text:span></text:p>
        </text:list-item>
        <text:list-item>
          <text:p text:style-name="P22"><text:bookmark text:name="p-rc_682cdc62ea7ae8d3-97"/><text:span text:style-name="T1">Limpieza Automatizada:</text:span> El script cierra de forma transparente cualquier ventana de gráfico o terminal del sismo anterior para evitar saturación del escritorio. </text:p>
        </text:list-item>
        <text:list-item>
          <text:p text:style-name="P14"><text:bookmark text:name="p-rc_682cdc62ea7ae8d3-98"/><text:span text:style-name="T3">Aislamiento Visual:</text:span><text:span text:style-name="T2"> Se inicializa una terminal flotante temporal (</text:span><text:span text:style-name="Source_20_Text"><text:span text:style-name="T2">xterm</text:span></text:span><text:span text:style-name="T2">) dedicada exclusivamente a la traza actual. </text:span></text:p>
        </text:list-item>
        <text:list-item>
          <text:p text:style-name="P22"><text:bookmark text:name="p-rc_682cdc62ea7ae8d3-99"/><text:span text:style-name="T1">Consulta de Base de Datos:</text:span> Se ejecuta un script de Python que se conecta a la base de datos PostgreSQL de SeisComP, procesa los parámetros y genera una hilera estandarizada de texto. </text:p>
        </text:list-item>
        <text:list-item>
          <text:p text:style-name="P14"><text:bookmark text:name="p-rc_682cdc62ea7ae8d3-100"/><text:span text:style-name="T3">Generación Gráfica:</text:span><text:span text:style-name="T2"> Un módulo especializado lee dicha hilera, analiza el entorno tectónico utilizando archivos locales de relieve, grillas de subducción y catálogos de localidades, desplegando los mapas interactivos con </text:span><text:span text:style-name="Source_20_Text"><text:span text:style-name="T2">matplotlib</text:span></text:span><text:span text:style-name="T2">. </text:span></text:p>
        </text:list-item>
        <text:list-item>
          <text:p text:style-name="P22"><text:bookmark text:name="p-rc_682cdc62ea7ae8d3-101"/><text:span text:style-name="T1">Autodestrucción:</text:span> Al cerrar la interfaz gráfica, el entorno temporal se destruye de forma automática liberando memoria. </text:p>
        </text:list-item>
      </text:list>
      <text:h text:style-name="P2" text:outline-level="2">2. Inventario Detallado de Scripts</text:h>
      <text:p text:style-name="P21">El core del sistema está compuesto por <text:span text:style-name="T1">4 scripts principales</text:span> interconectados:</text:p>
      <text:h text:style-name="P3" text:outline-level="3"><text:span text:style-name="T5">A. </text:span><text:span text:style-name="Source_20_Text"><text:span text:style-name="T2">newpt.sh</text:span></text:span><text:span text:style-name="T5"> (Script Lanzador / Bash)</text:span></text:h>
      <text:list text:style-name="L2">
        <text:list-item>
          <text:p text:style-name="P23"><text:bookmark text:name="p-rc_682cdc62ea7ae8d3-102"/><text:span text:style-name="T1">Función:</text:span> Orquestador principal del pipeline. Controla el ciclo de vida de las ventanas del sistema y asegura la persistencia ordenada en la estación de trabajo. </text:p>
        </text:list-item>
        <text:list-item>
          <text:p text:style-name="P15"><text:bookmark text:name="p-rc_682cdc62ea7ae8d3-103"/><text:soft-page-break/><text:span text:style-name="T3">Lógica Clave:</text:span><text:span text:style-name="T2"> Usa </text:span><text:span text:style-name="Source_20_Text"><text:span text:style-name="T2">pkill</text:span></text:span><text:span text:style-name="T2"> con expresiones regulares basadas en rutas absolutas para matar procesos huérfanos anteriores. Invoca a </text:span><text:span text:style-name="Source_20_Text"><text:span text:style-name="T2">xterm</text:span></text:span><text:span text:style-name="T2"> para ejecutar el sub-shell de Bash que une la consulta de base de datos y la graficación gráfica. </text:span></text:p>
        </text:list-item>
      </text:list>
      <text:h text:style-name="P3" text:outline-level="3"><text:span text:style-name="T5">B. </text:span><text:span text:style-name="Source_20_Text"><text:span text:style-name="T2">consulta_evento_individual.py</text:span></text:span><text:span text:style-name="T5"> (Módulo de Extracción de Datos)</text:span></text:h>
      <text:p text:style-name="P21"><text:bookmark text:name="p-rc_682cdc62ea7ae8d3-104"/>(Invocado en el lanzador bajo el nombre general de consulta) </text:p>
      <text:list text:style-name="L3">
        <text:list-item>
          <text:p text:style-name="P16"><text:bookmark text:name="p-rc_682cdc62ea7ae8d3-105"/><text:span text:style-name="T3">Función:</text:span><text:span text:style-name="T2"> Conector SQL con la base de datos de SeisComP (</text:span><text:span text:style-name="Source_20_Text"><text:span text:style-name="T2">10.54.217.69</text:span></text:span><text:span text:style-name="T2">). </text:span></text:p>
        </text:list-item>
        <text:list-item>
          <text:p text:style-name="P16"><text:bookmark text:name="p-rc_682cdc62ea7ae8d3-106"/><text:span text:style-name="T3">Lógica Clave:</text:span><text:span text:style-name="T2"> Realiza un parseo inteligente del ID recibido. Si identifica patrones tipo </text:span><text:span text:style-name="Source_20_Text"><text:span text:style-name="T2">Origin/</text:span></text:span><text:span text:style-name="T2"> o </text:span><text:span text:style-name="Source_20_Text"><text:span text:style-name="T2">NLL.</text:span></text:span><text:span text:style-name="T2">, extrae la estampa de tiempo e interroga a la base de datos mediante rangos de tolerancia de ±3 segundos sobre la fecha de creación (</text:span><text:span text:style-name="Source_20_Text"><text:span text:style-name="T2">m_creationinfo_creationtime</text:span></text:span><text:span text:style-name="T2">). Si no posee el formato, busca directamente por identificador único. Formatea las coordenadas geográficas a strings con sufijos cardinales (</text:span><text:span text:style-name="Source_20_Text"><text:span text:style-name="T2">S</text:span></text:span><text:span text:style-name="T2">, </text:span><text:span text:style-name="Source_20_Text"><text:span text:style-name="T2">N</text:span></text:span><text:span text:style-name="T2">, </text:span><text:span text:style-name="Source_20_Text"><text:span text:style-name="T2">W</text:span></text:span><text:span text:style-name="T2">, </text:span><text:span text:style-name="Source_20_Text"><text:span text:style-name="T2">E</text:span></text:span><text:span text:style-name="T2">) requeridos por el ploteador. </text:span></text:p>
        </text:list-item>
      </text:list>
      <text:h text:style-name="P3" text:outline-level="3"><text:span text:style-name="T5">C. </text:span><text:span text:style-name="Source_20_Text"><text:span text:style-name="T2">capturar.py</text:span></text:span><text:span text:style-name="T5"> (Motor Gráfico Sismotectónico)</text:span></text:h>
      <text:list text:style-name="L4">
        <text:list-item>
          <text:p text:style-name="P24"><text:bookmark text:name="p-rc_682cdc62ea7ae8d3-107"/><text:span text:style-name="T1">Función:</text:span> Núcleo de cálculo geográfico y renderizado visual interactivo. </text:p>
        </text:list-item>
        <text:list-item>
          <text:p text:style-name="P27">Lógica Clave:</text:p>
          <text:list>
            <text:list-item>
              <text:p text:style-name="P24"><text:bookmark text:name="p-rc_682cdc62ea7ae8d3-108"/><text:span text:style-name="T1">Geodesia:</text:span> Calcula distancias ortodrómicas mediante la fórmula de Haversine y estima rumbos angulares en puntos cardinales (<text:span text:style-name="T6">N, NE, E, SE...</text:span>) respecto a sismos históricos y localidades. </text:p>
            </text:list-item>
            <text:list-item>
              <text:p text:style-name="P17"><text:bookmark text:name="p-rc_682cdc62ea7ae8d3-109"/><text:span text:style-name="T3">Perfil de Subducción Inteligente:</text:span><text:span text:style-name="T2"> Ejecuta un barrido lógico por 13 perfiles locales de placas (</text:span><text:span text:style-name="Source_20_Text"><text:span text:style-name="T2">slabP01.tmp</text:span></text:span><text:span text:style-name="T2"> a </text:span><text:span text:style-name="Source_20_Text"><text:span text:style-name="T2">slabP13.tmp</text:span></text:span><text:span text:style-name="T2">). Si el epicentro se encuentra a menos de 1.5° de un perfil, carga la grilla local y su topografía asociada (</text:span><text:span text:style-name="Source_20_Text"><text:span text:style-name="T2">topoPXX.tmp</text:span></text:span><text:span text:style-name="T2">). En caso de encontrarse fuera de cobertura, recurre mediante interpolación lineal de variables al modelo sismológico global </text:span><text:span text:style-name="Source_20_Text"><text:span text:style-name="T2">Slab2</text:span></text:span><text:span text:style-name="T2"> (</text:span><text:span text:style-name="Source_20_Text"><text:span text:style-name="T2">sam_slab2_dep_02.23.18.xyz</text:span></text:span><text:span text:style-name="T2">). </text:span></text:p>
            </text:list-item>
            <text:list-item>
              <text:p text:style-name="P17"><text:bookmark text:name="p-rc_682cdc62ea7ae8d3-110"/><text:span text:style-name="T3">Proyección:</text:span><text:span text:style-name="T2"> Usa </text:span><text:span text:style-name="Source_20_Text"><text:span text:style-name="T2">cartopy</text:span></text:span><text:span text:style-name="T2"> bajo la proyección </text:span><text:span text:style-name="Source_20_Text"><text:span text:style-name="T2">PlateCarree</text:span></text:span><text:span text:style-name="T2"> para superponer la matriz ráster del mapa de relieve sobre los vectores costeros y políticos. </text:span></text:p>
            </text:list-item>
          </text:list>
        </text:list-item>
      </text:list>
      <text:h text:style-name="P3" text:outline-level="3"><text:span text:style-name="T5">D. </text:span><text:span text:style-name="Source_20_Text"><text:span text:style-name="T2">lee_catalogo.py</text:span></text:span><text:span text:style-name="T5"> (Módulo de Lectura de Catálogos)</text:span></text:h>
      <text:list text:style-name="L5">
        <text:list-item>
          <text:p text:style-name="P18"><text:bookmark text:name="p-rc_682cdc62ea7ae8d3-111"/><text:span text:style-name="T3">Función:</text:span><text:span text:style-name="T2"> Script de utilería encargado de estandarizar la entrada de datos provenientes de archivos de sismicidad históricos en formato </text:span><text:span text:style-name="Source_20_Text"><text:span text:style-name="T2">.dat</text:span></text:span><text:span text:style-name="T2">. </text:span></text:p>
        </text:list-item>
        <text:list-item>
          <text:p text:style-name="P18"><text:bookmark text:name="p-rc_682cdc62ea7ae8d3-112"/><text:span text:style-name="T3">Lógica Clave:</text:span><text:span text:style-name="T2"> Utiliza </text:span><text:span text:style-name="Source_20_Text"><text:span text:style-name="T2">numpy.loadtxt</text:span></text:span><text:span text:style-name="T2"> indexando las columnas específicas de Latitud (2), Longitud (3), Profundidad (4) y Magnitud (5) para vectorizar la lectura </text:span><text:soft-page-break/><text:span text:style-name="T2">de miles de sismos en arrays de alta velocidad, transformándolos posteriormente en un DataFrame de </text:span><text:span text:style-name="Source_20_Text"><text:span text:style-name="T2">pandas</text:span></text:span><text:span text:style-name="T2"> para filtros lógicos rápidos. </text:span></text:p>
        </text:list-item>
      </text:list>
      <text:h text:style-name="P2" text:outline-level="2">3. Formato de Archivos e Intercambio Temporal</text:h>
      <text:p text:style-name="P21">El sistema utiliza un <text:span text:style-name="T1">mecanismo de comunicación desacoplado basado en archivos de texto plano</text:span> para resguardar la modularidad de los scripts:</text:p>
      <text:list text:style-name="L6">
        <text:list-item>
          <text:p text:style-name="P19"><text:span text:style-name="T3">Archivo de Intercambio:</text:span><text:span text:style-name="T2"> </text:span><text:span text:style-name="Source_20_Text"><text:span text:style-name="T2">evento_data.txt</text:span></text:span></text:p>
        </text:list-item>
        <text:list-item>
          <text:p text:style-name="P19"><text:bookmark text:name="p-rc_682cdc62ea7ae8d3-113"/><text:span text:style-name="T3">Ubicación Estricta:</text:span><text:span text:style-name="T2"> </text:span><text:span text:style-name="Source_20_Text"><text:span text:style-name="T2">/home/hriquelmez/Desarrollo/mapasopa/ploteo/evento_data.txt</text:span></text:span></text:p>
        </text:list-item>
        <text:list-item>
          <text:p text:style-name="P19"><text:bookmark text:name="p-rc_682cdc62ea7ae8d3-114"/><text:bookmark text:name="p-rc_682cdc62ea7ae8d3-115"/><text:span text:style-name="T3">Estructura:</text:span><text:span text:style-name="T2"> Consta de una única línea de texto con </text:span><text:span text:style-name="T3">19 campos</text:span><text:span text:style-name="T2"> indexados estrictamente mediante separadores de </text:span><text:span text:style-name="T3">punto y coma (</text:span><text:span text:style-name="Source_20_Text"><text:span text:style-name="T3">;</text:span></text:span><text:span text:style-name="T3">)</text:span><text:span text:style-name="T2">. </text:span></text:p>
        </text:list-item>
        <text:list-item>
          <text:p text:style-name="P28">Ejemplo de Formato Interno:</text:p>
          <text:p text:style-name="P25">Plaintext</text:p>
          <text:p text:style-name="P5"><text:span text:style-name="Source_20_Text"><text:span text:style-name="T2">2026-07-13 13:45:22;;;6.2;Mw;84;0.45;22;32.45 S;71.30 W;45 km;from location;confirmed;;2;CSN;analista_turno;Valparaiso, Chile;csn_ev2026xxxx</text:span></text:span></text:p>
        </text:list-item>
        <text:list-item>
          <text:p text:style-name="P19"><text:bookmark text:name="p-rc_682cdc62ea7ae8d3-116"/><text:span text:style-name="T3">Ciclo de vida:</text:span><text:span text:style-name="T2"> Es creado por </text:span><text:span text:style-name="Source_20_Text"><text:span text:style-name="T2">consulta_evento_individual.py</text:span></text:span><text:span text:style-name="T2">, leído inmediatamente por </text:span><text:span text:style-name="Source_20_Text"><text:span text:style-name="T2">capturar.py</text:span></text:span><text:span text:style-name="T2"> para extraer las variables físicas, y </text:span><text:span text:style-name="T3">eliminado de inmediato mediante </text:span><text:span text:style-name="Source_20_Text"><text:span text:style-name="T3">os.remove()</text:span></text:span><text:span text:style-name="T2"> una vez que los gráficos se cargan en memoria para asegurar que no existan colisiones de datos en sismos subsecuentes. </text:span></text:p>
        </text:list-item>
      </text:list>
      <text:h text:style-name="P2" text:outline-level="2">4. Requisitos de Instalación en Máquinas Nuevas</text:h>
      <text:p text:style-name="P21">Para desplegar este proyecto exitosamente en una estación de trabajo nueva con <text:span text:style-name="T1">Ubuntu o Debian</text:span>, es necesario instalar las dependencias del sistema operativo y las librerías del ecosistema científico de Python.</text:p>
      <text:h text:style-name="P4" text:outline-level="3">A. Dependencias del Sistema Operativo (APT)</text:h>
      <text:p text:style-name="P21">Debido a que las librerías geográficas requieren compiladores C subyacentes y el sistema requiere aislamiento visual, ejecuta obligatoriamente en tu terminal:</text:p>
      <text:p text:style-name="P21">Bash</text:p>
      <text:p text:style-name="P6"><text:span text:style-name="Source_20_Text"><text:span text:style-name="T2">sudo apt update</text:span></text:span></text:p>
      <text:p text:style-name="P7"><text:span text:style-name="Source_20_Text"><text:span text:style-name="T2">sudo apt install -y xterm python3-pip python3-dev libproj-dev proj-data proj-bin libgeos-dev</text:span></text:span></text:p>
      <text:p text:style-name="P9"><text:bookmark text:name="p-rc_682cdc62ea7ae8d3-117"/><text:soft-page-break/><text:span text:style-name="T3">Importante:</text:span><text:span text:style-name="T2"> </text:span><text:span text:style-name="Source_20_Text"><text:span text:style-name="T2">xterm</text:span></text:span><text:span text:style-name="T2"> es mandatorio en entornos Debian/Ubuntu sin importar el gestor de escritorio (GNOME, XFCE, etc.), ya que provee la ventana flotante estándar utilizada por </text:span><text:span text:style-name="Source_20_Text"><text:span text:style-name="T2">newpt.sh</text:span></text:span><text:span text:style-name="T2">. </text:span></text:p>
      <text:h text:style-name="P4" text:outline-level="3">B. Dependencias de Python (PIP / Entorno Virtual)</text:h>
      <text:p text:style-name="P21">Se recomienda instalar los paquetes científicos en sus versiones estables. Puedes hacerlo directo en el sistema o dentro de tu entorno virtual:</text:p>
      <text:p text:style-name="P21">Bash</text:p>
      <text:p text:style-name="P6"><text:span text:style-name="Source_20_Text"><text:span text:style-name="T2">pip3 install numpy pandas matplotlib cartopy psycopg2-binary pillow pyperclip</text:span></text:span></text:p>
      <text:h text:style-name="P4" text:outline-level="3">Tabla de Resumen de Módulos Críticos y su Función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<text:span text:style-name="Strong_20_Emphasis"><text:span text:style-name="T2">Módulo Python</text:span></text:span></text:p>
            </table:table-cell>
            <table:table-cell table:style-name="Table1.A1" office:value-type="string">
              <text:p text:style-name="P11"><text:span text:style-name="Strong_20_Emphasis"><text:span text:style-name="T2">Utilidad en el Proyecto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<text:span text:style-name="Source_20_Text"><text:span text:style-name="T2">psycopg2-binary</text:span></text:span></text:p>
          </table:table-cell>
          <table:table-cell table:style-name="Table1.A1" office:value-type="string">
            <text:p text:style-name="P12"><text:bookmark text:name="p-rc_682cdc62ea7ae8d3-118"/>Conexión e interacción con las bases de datos PostgreSQL de SeisComP. <text:span text:style-name="T4"/></text:p>
          </table:table-cell>
        </table:table-row>
        <table:table-row>
          <table:table-cell table:style-name="Table1.A1" office:value-type="string">
            <text:p text:style-name="P10"><text:span text:style-name="Source_20_Text"><text:span text:style-name="T2">cartopy</text:span></text:span></text:p>
          </table:table-cell>
          <table:table-cell table:style-name="Table1.A1" office:value-type="string">
            <text:p text:style-name="P12"><text:bookmark text:name="p-rc_682cdc62ea7ae8d3-119"/>Gestión de proyecciones cartográficas, líneas de costa y fronteras. <text:span text:style-name="T4"/></text:p>
          </table:table-cell>
        </table:table-row>
        <table:table-row>
          <table:table-cell table:style-name="Table1.A1" office:value-type="string">
            <text:p text:style-name="P10"><text:span text:style-name="Source_20_Text"><text:span text:style-name="T2">matplotlib</text:span></text:span></text:p>
          </table:table-cell>
          <table:table-cell table:style-name="Table1.A1" office:value-type="string">
            <text:p text:style-name="P12"><text:bookmark text:name="p-rc_682cdc62ea7ae8d3-120"/>Generación de las ventanas gráficas interactivas y perfiles 2D. <text:span text:style-name="T4"/></text:p>
          </table:table-cell>
        </table:table-row>
        <table:table-row>
          <table:table-cell table:style-name="Table1.A1" office:value-type="string">
            <text:p text:style-name="P10"><text:span text:style-name="Source_20_Text"><text:span text:style-name="T2">numpy</text:span></text:span><text:span text:style-name="T2"> / </text:span><text:span text:style-name="Source_20_Text"><text:span text:style-name="T2">pandas</text:span></text:span></text:p>
          </table:table-cell>
          <table:table-cell table:style-name="Table1.A1" office:value-type="string">
            <text:p text:style-name="P12"><text:bookmark text:name="p-rc_682cdc62ea7ae8d3-121"/>Procesamiento analítico rápido de catálogos e interpolación de matrices del Slab. <text:span text:style-name="T4"/></text:p>
          </table:table-cell>
        </table:table-row>
        <table:table-row>
          <table:table-cell table:style-name="Table1.A1" office:value-type="string">
            <text:p text:style-name="P10"><text:span text:style-name="Source_20_Text"><text:span text:style-name="T2">pillow</text:span></text:span><text:span text:style-name="T2"> (</text:span><text:span text:style-name="Source_20_Text"><text:span text:style-name="T2">PIL</text:span></text:span><text:span text:style-name="T2">)</text:span></text:p>
          </table:table-cell>
          <table:table-cell table:style-name="Table1.A1" office:value-type="string">
            <text:p text:style-name="P10"><text:bookmark text:name="p-rc_682cdc62ea7ae8d3-122"/><text:span text:style-name="T2">Renderizado y mapeo dinámico del archivo ráster de relieve pesado </text:span><text:span text:style-name="Source_20_Text"><text:span text:style-name="T2">.tif</text:span></text:span><text:span text:style-name="T2">. </text:span></text:p>
          </table:table-cell>
        </table:table-row>
      </table:table>
      <text:h text:style-name="P2" text:outline-level="2">5. Consideraciones Claves para el Administrador</text:h>
      <text:list text:style-name="L7">
        <text:list-item>
          <text:p text:style-name="P20"><text:bookmark text:name="p-rc_682cdc62ea7ae8d3-123"/><text:span text:style-name="T3">Rutas Absolutas (Hardcoded):</text:span><text:span text:style-name="T2"> El script </text:span><text:span text:style-name="Source_20_Text"><text:span text:style-name="T2">newpt.sh</text:span></text:span><text:span text:style-name="T2"> y </text:span><text:span text:style-name="Source_20_Text"><text:span text:style-name="T2">consulta_evento_individual.py</text:span></text:span><text:span text:style-name="T2"> tienen configurada de forma fija la ruta </text:span><text:span text:style-name="Source_20_Text"><text:span text:style-name="T2">/home/hriquelmez/Desarrollo/mapasopa/ploteo/</text:span></text:span><text:span text:style-name="T2">. Si en las máquinas de producción el usuario cambia (ej. </text:span><text:span text:style-name="Source_20_Text"><text:span text:style-name="T2">/home/sysop/</text:span></text:span><text:span text:style-name="T2">), se deben modificar estas líneas al inicio de los archivos para que el validador de Bash </text:span><text:span text:style-name="Source_20_Text"><text:span text:style-name="T2">-f</text:span></text:span><text:span text:style-name="T2"> localice el intercambio de datos. </text:span></text:p>
        </text:list-item>
        <text:list-item>
          <text:p text:style-name="P26"><text:soft-page-break/><text:span text:style-name="T1">Archivos Estáticos Requeridos:</text:span> Para que el graficador funcione, deben existir en la misma carpeta los archivos complementarios que no se detallaron en el código:</text:p>
          <text:list>
            <text:list-item>
              <text:p text:style-name="P20"><text:bookmark text:name="p-rc_682cdc62ea7ae8d3-124"/><text:span text:style-name="Source_20_Text"><text:span text:style-name="T2">NE2_LR_LC_SR_W_DR.tif</text:span></text:span><text:span text:style-name="T2"> (Relieve ráster de fondo). </text:span></text:p>
            </text:list-item>
            <text:list-item>
              <text:p text:style-name="P20"><text:bookmark text:name="p-rc_682cdc62ea7ae8d3-125"/><text:span text:style-name="Source_20_Text"><text:span text:style-name="T2">localidades.csv</text:span></text:span><text:span text:style-name="T2"> (Base de datos de ciudades y latitudes/longitudes para cálculo de distancias de referencia). </text:span></text:p>
            </text:list-item>
            <text:list-item>
              <text:p text:style-name="P20"><text:bookmark text:name="p-rc_682cdc62ea7ae8d3-126"/><text:span text:style-name="Source_20_Text"><text:span text:style-name="T2">base_2023_2026.dat</text:span></text:span><text:span text:style-name="T2"> (Catálogo histórico de sismicidad de fondo). </text:span></text:p>
            </text:list-item>
            <text:list-item>
              <text:p text:style-name="P20"><text:bookmark text:name="p-rc_682cdc62ea7ae8d3-127"/><text:span text:style-name="T2">Carpeta </text:span><text:span text:style-name="Source_20_Text"><text:span text:style-name="T2">./grillas/</text:span></text:span><text:span text:style-name="T2"> (Conteniendo los archivos </text:span><text:span text:style-name="Source_20_Text"><text:span text:style-name="T2">.tmp</text:span></text:span><text:span text:style-name="T2"> de los perfiles y el archivo global </text:span><text:span text:style-name="Source_20_Text"><text:span text:style-name="T2">.xyz</text:span></text:span><text:span text:style-name="T2"> de Slab2). </text:span></text:p>
            </text:list-item>
          </text:list>
        </text:list-item>
        <text:list-item>
          <text:p text:style-name="P26"><text:span text:style-name="T1">Permisos de Ejecución:</text:span> Asegúrate de otorgar permisos de ejecución al script lanzador en cada instalación nueva:</text:p>
          <text:p text:style-name="P26">Bash</text:p>
          <text:p text:style-name="P8"><text:span text:style-name="Source_20_Text"><text:span text:style-name="T2">chmod +x /ruta/al/proyecto/newpt.s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4:05:16.261650149</meta:creation-date>
    <dc:date>2026-07-13T14:07:37.478401381</dc:date>
    <meta:editing-duration>PT2M21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5" meta:paragraph-count="72" meta:word-count="1068" meta:character-count="7423" meta:non-whitespace-character-count="6428"/>
  </office:meta>
</office:document-meta>
</file>