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3in"/>
    </style:style>
    <style:style style:name="Table1.B" style:family="table-column">
      <style:table-column-properties style:column-width="5.625in"/>
    </style:style>
    <style:style style:name="Table1.A1" style:family="table-cell">
      <style:table-cell-properties style:vertical-align="middle" fo:padding-left="0.125in" fo:padding-right="0.125in" fo:padding-top="0.0833in" fo:padding-bottom="0.0833in" fo:border="0.05pt solid #c4c7c5"/>
    </style:style>
    <style:style style:name="Table1.A6" style:family="table-cell">
      <style:table-cell-properties style:vertical-align="middle" fo:padding-left="0.125in" fo:padding-right="0.125in" fo:padding-top="0.0833in" fo:padding-bottom="0.0833in" fo:border-left="0.05pt solid #c4c7c5" fo:border-right="0.05pt solid #c4c7c5" fo:border-top="none" fo:border-bottom="0.05pt solid #c4c7c5"/>
    </style:style>
    <style:style style:name="P1" style:family="paragraph" style:parent-style-name="Heading_20_1">
      <style:paragraph-properties fo:margin-left="0in" fo:margin-right="0in" fo:margin-top="0in" fo:margin-bottom="0.0972in" style:contextual-spacing="false" fo:line-height="114%" fo:text-indent="0in" style:auto-text-indent="false"/>
      <style:text-properties style:font-name="Google Sans"/>
    </style:style>
    <style:style style:name="P2" style:family="paragraph" style:parent-style-name="Heading_20_2">
      <style:paragraph-properties fo:margin-left="0in" fo:margin-right="0in" fo:margin-top="0in" fo:margin-bottom="0.0972in" style:contextual-spacing="false" fo:line-height="114%" fo:text-indent="0in" style:auto-text-indent="false"/>
      <style:text-properties style:font-name="Google Sans"/>
    </style:style>
    <style:style style:name="P3" style:family="paragraph" style:parent-style-name="Heading_20_3">
      <style:paragraph-properties fo:margin-left="0in" fo:margin-right="0in" fo:margin-top="0in" fo:margin-bottom="0.0835in" style:contextual-spacing="false" fo:line-height="114%" fo:text-indent="0in" style:auto-text-indent="false"/>
    </style:style>
    <style:style style:name="P4"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5" style:family="paragraph" style:parent-style-name="Preformatted_20_Text" style:list-style-name="L6">
      <style:paragraph-properties fo:margin-left="0in" fo:margin-right="0in" fo:margin-top="0in" fo:margin-bottom="0in" style:contextual-spacing="false" fo:line-height="114%" fo:text-indent="0in" style:auto-text-indent="false" fo:padding="0in" fo:border="none"/>
    </style:style>
    <style:style style:name="P6" style:family="paragraph" style:parent-style-name="Preformatted_20_Text">
      <style:paragraph-properties fo:margin-left="0in" fo:margin-right="0in" fo:margin-top="0in" fo:margin-bottom="0in" style:contextual-spacing="false" fo:line-height="114%" fo:text-indent="0in" style:auto-text-indent="false"/>
    </style:style>
    <style:style style:name="P7" style:family="paragraph" style:parent-style-name="Preformatted_20_Text">
      <style:paragraph-properties fo:margin-top="0in" fo:margin-bottom="0in" style:contextual-spacing="false" fo:line-height="114%"/>
    </style:style>
    <style:style style:name="P8" style:family="paragraph" style:parent-style-name="Preformatted_20_Text" style:list-style-name="L7">
      <style:paragraph-properties fo:margin-left="0in" fo:margin-right="0in" fo:margin-top="0in" fo:margin-bottom="0in" style:contextual-spacing="false" fo:line-height="114%" fo:text-indent="0in" style:auto-text-indent="false" fo:padding="0in" fo:border="none"/>
    </style:style>
    <style:style style:name="P9" style:family="paragraph" style:parent-style-name="Quotations">
      <style:paragraph-properties fo:margin-left="0.3937in" fo:margin-right="0.3937in" fo:margin-top="0in" fo:margin-bottom="0.1965in" style:contextual-spacing="false" fo:line-height="114%" fo:text-indent="0in" style:auto-text-indent="false"/>
    </style:style>
    <style:style style:name="P10" style:family="paragraph" style:parent-style-name="Table_20_Contents">
      <style:paragraph-properties fo:margin-left="0in" fo:margin-right="0in" fo:margin-top="0in" fo:margin-bottom="0.0972in" style:contextual-spacing="false" fo:line-height="114%" fo:text-indent="0in" style:auto-text-indent="false"/>
    </style:style>
    <style:style style:name="P11" style:family="paragraph" style:parent-style-name="Table_20_Contents">
      <style:paragraph-properties fo:margin-left="0in" fo:margin-right="0in" fo:margin-top="0in" fo:margin-bottom="0in" style:contextual-spacing="false" fo:line-height="114%" fo:text-indent="0in" style:auto-text-indent="false"/>
    </style:style>
    <style:style style:name="P12"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style:style>
    <style:style style:name="P13" style:family="paragraph" style:parent-style-name="Text_20_body">
      <style:paragraph-properties fo:margin-left="0in" fo:margin-right="0in" fo:margin-top="0in" fo:margin-bottom="0.0972in" style:contextual-spacing="false" fo:line-height="114%" fo:text-indent="0in" style:auto-text-indent="false"/>
    </style:style>
    <style:style style:name="P14"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15"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style>
    <style:style style:name="P16"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style>
    <style:style style:name="P17"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style>
    <style:style style:name="P18"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style>
    <style:style style:name="P19"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style>
    <style:style style:name="P20"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style>
    <style:style style:name="P21"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22"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3"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4"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5"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6"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7"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28"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T1" style:family="text">
      <style:text-properties fo:font-weight="bold"/>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style:font-name="Google Sans Text" style:font-name-asian="Google Sans Text" style:font-name-complex="Google Sans Text"/>
    </style:style>
    <style:style style:name="T5" style:family="text">
      <style:text-properties style:font-name="Google Sans"/>
    </style:style>
    <style:style style:name="T6" style:family="text">
      <style:text-properties fo:font-style="italic"/>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forme Técnico de Proyecto: Sistema de Ploteo Sismotectónico Dinámico (NewPT)</text:h>
      <text:h text:style-name="P2" text:outline-level="2">1. Arquitectura General y Flujo de Trabajo</text:h>
      <text:p text:style-name="P13"><text:span text:style-name="T2">El sistema automatiza la extracción, procesamiento y graficación tridimensional (planta y perfil) de parámetros sísmicos en tiempo real tras ser invocado por el sistema de adquisición </text:span><text:span text:style-name="T3">SeisComP</text:span><text:span text:style-name="T2"> (módulo </text:span><text:span text:style-name="Source_20_Text"><text:span text:style-name="T2">scolv</text:span></text:span><text:span text:style-name="T2">).</text:span></text:p>
      <text:p text:style-name="P21">El flujo lógico opera secuencialmente de la siguiente manera:</text:p>
      <text:list text:style-name="L1">
        <text:list-item>
          <text:p text:style-name="P14"><text:bookmark text:name="p-rc_682cdc62ea7ae8d3-96"/><text:span text:style-name="T3">Invocación:</text:span><text:span text:style-name="T2"> El operador presiona el botón configurado en </text:span><text:span text:style-name="Source_20_Text"><text:span text:style-name="T2">scolv</text:span></text:span><text:span text:style-name="T2">, gatillando el script de Bash </text:span><text:span text:style-name="Source_20_Text"><text:span text:style-name="T2">newpt.sh</text:span></text:span><text:span text:style-name="T2"> y pasándole como argumento el ID único del evento (</text:span><text:span text:style-name="Source_20_Text"><text:span text:style-name="T2">EVENT_ID</text:span></text:span><text:span text:style-name="T2"> o </text:span><text:span text:style-name="Source_20_Text"><text:span text:style-name="T2">OriginID</text:span></text:span><text:span text:style-name="T2">). </text:span></text:p>
        </text:list-item>
        <text:list-item>
          <text:p text:style-name="P22"><text:bookmark text:name="p-rc_682cdc62ea7ae8d3-97"/><text:span text:style-name="T1">Limpieza Automatizada:</text:span> El script cierra de forma transparente cualquier ventana de gráfico o terminal del sismo anterior para evitar saturación del escritorio. </text:p>
        </text:list-item>
        <text:list-item>
          <text:p text:style-name="P14"><text:bookmark text:name="p-rc_682cdc62ea7ae8d3-98"/><text:span text:style-name="T3">Aislamiento Visual:</text:span><text:span text:style-name="T2"> Se inicializa una terminal flotante temporal (</text:span><text:span text:style-name="Source_20_Text"><text:span text:style-name="T2">xterm</text:span></text:span><text:span text:style-name="T2">) dedicada exclusivamente a la traza actual. </text:span></text:p>
        </text:list-item>
        <text:list-item>
          <text:p text:style-name="P22"><text:bookmark text:name="p-rc_682cdc62ea7ae8d3-99"/><text:span text:style-name="T1">Consulta de Base de Datos:</text:span> Se ejecuta un script de Python que se conecta a la base de datos PostgreSQL de SeisComP, procesa los parámetros y genera una hilera estandarizada de texto. </text:p>
        </text:list-item>
        <text:list-item>
          <text:p text:style-name="P14"><text:bookmark text:name="p-rc_682cdc62ea7ae8d3-100"/><text:span text:style-name="T3">Generación Gráfica:</text:span><text:span text:style-name="T2"> Un módulo especializado lee dicha hilera, analiza el entorno tectónico utilizando archivos locales de relieve, grillas de subducción y catálogos de localidades, desplegando los mapas interactivos con </text:span><text:span text:style-name="Source_20_Text"><text:span text:style-name="T2">matplotlib</text:span></text:span><text:span text:style-name="T2">. </text:span></text:p>
        </text:list-item>
        <text:list-item>
          <text:p text:style-name="P22"><text:bookmark text:name="p-rc_682cdc62ea7ae8d3-101"/><text:span text:style-name="T1">Autodestrucción:</text:span> Al cerrar la interfaz gráfica, el entorno temporal se destruye de forma automática liberando memoria. </text:p>
        </text:list-item>
      </text:list>
      <text:h text:style-name="P2" text:outline-level="2">2. Inventario Detallado de Scripts</text:h>
      <text:p text:style-name="P21">El core del sistema está compuesto por <text:span text:style-name="T1">4 scripts principales</text:span> interconectados:</text:p>
      <text:h text:style-name="P3" text:outline-level="3"><text:span text:style-name="T5">A. </text:span><text:span text:style-name="Source_20_Text"><text:span text:style-name="T2">newpt.sh</text:span></text:span><text:span text:style-name="T5"> (Script Lanzador / Bash)</text:span></text:h>
      <text:list text:style-name="L2">
        <text:list-item>
          <text:p text:style-name="P23"><text:bookmark text:name="p-rc_682cdc62ea7ae8d3-102"/><text:span text:style-name="T1">Función:</text:span> Orquestador principal del pipeline. Controla el ciclo de vida de las ventanas del sistema y asegura la persistencia ordenada en la estación de trabajo. </text:p>
        </text:list-item>
        <text:list-item>
          <text:p text:style-name="P15"><text:bookmark text:name="p-rc_682cdc62ea7ae8d3-103"/><text:soft-page-break/><text:span text:style-name="T3">Lógica Clave:</text:span><text:span text:style-name="T2"> Usa </text:span><text:span text:style-name="Source_20_Text"><text:span text:style-name="T2">pkill</text:span></text:span><text:span text:style-name="T2"> con expresiones regulares basadas en rutas absolutas para matar procesos huérfanos anteriores. Invoca a </text:span><text:span text:style-name="Source_20_Text"><text:span text:style-name="T2">xterm</text:span></text:span><text:span text:style-name="T2"> para ejecutar el sub-shell de Bash que une la consulta de base de datos y la graficación gráfica. </text:span></text:p>
        </text:list-item>
      </text:list>
      <text:h text:style-name="P3" text:outline-level="3"><text:span text:style-name="T5">B. </text:span><text:span text:style-name="Source_20_Text"><text:span text:style-name="T2">consulta_evento_individual.py</text:span></text:span><text:span text:style-name="T5"> (Módulo de Extracción de Datos)</text:span></text:h>
      <text:p text:style-name="P21"><text:bookmark text:name="p-rc_682cdc62ea7ae8d3-104"/>(Invocado en el lanzador bajo el nombre general de consulta) </text:p>
      <text:list text:style-name="L3">
        <text:list-item>
          <text:p text:style-name="P16"><text:bookmark text:name="p-rc_682cdc62ea7ae8d3-105"/><text:span text:style-name="T3">Función:</text:span><text:span text:style-name="T2"> Conector SQL con la base de datos de SeisComP (</text:span><text:span text:style-name="Source_20_Text"><text:span text:style-name="T2">10.54.217.69</text:span></text:span><text:span text:style-name="T2">). </text:span></text:p>
        </text:list-item>
        <text:list-item>
          <text:p text:style-name="P16"><text:bookmark text:name="p-rc_682cdc62ea7ae8d3-106"/><text:span text:style-name="T3">Lógica Clave:</text:span><text:span text:style-name="T2"> Realiza un parseo inteligente del ID recibido. Si identifica patrones tipo </text:span><text:span text:style-name="Source_20_Text"><text:span text:style-name="T2">Origin/</text:span></text:span><text:span text:style-name="T2"> o </text:span><text:span text:style-name="Source_20_Text"><text:span text:style-name="T2">NLL.</text:span></text:span><text:span text:style-name="T2">, extrae la estampa de tiempo e interroga a la base de datos mediante rangos de tolerancia de ±3 segundos sobre la fecha de creación (</text:span><text:span text:style-name="Source_20_Text"><text:span text:style-name="T2">m_creationinfo_creationtime</text:span></text:span><text:span text:style-name="T2">). Si no posee el formato, busca directamente por identificador único. Formatea las coordenadas geográficas a strings con sufijos cardinales (</text:span><text:span text:style-name="Source_20_Text"><text:span text:style-name="T2">S</text:span></text:span><text:span text:style-name="T2">, </text:span><text:span text:style-name="Source_20_Text"><text:span text:style-name="T2">N</text:span></text:span><text:span text:style-name="T2">, </text:span><text:span text:style-name="Source_20_Text"><text:span text:style-name="T2">W</text:span></text:span><text:span text:style-name="T2">, </text:span><text:span text:style-name="Source_20_Text"><text:span text:style-name="T2">E</text:span></text:span><text:span text:style-name="T2">) requeridos por el ploteador. </text:span></text:p>
        </text:list-item>
      </text:list>
      <text:h text:style-name="P3" text:outline-level="3"><text:span text:style-name="T5">C. </text:span><text:span text:style-name="Source_20_Text"><text:span text:style-name="T2">capturar.py</text:span></text:span><text:span text:style-name="T5"> (Motor Gráfico Sismotectónico)</text:span></text:h>
      <text:list text:style-name="L4">
        <text:list-item>
          <text:p text:style-name="P24"><text:bookmark text:name="p-rc_682cdc62ea7ae8d3-107"/><text:span text:style-name="T1">Función:</text:span> Núcleo de cálculo geográfico y renderizado visual interactivo. </text:p>
        </text:list-item>
        <text:list-item>
          <text:p text:style-name="P27">Lógica Clave:</text:p>
          <text:list>
            <text:list-item>
              <text:p text:style-name="P24"><text:bookmark text:name="p-rc_682cdc62ea7ae8d3-108"/><text:span text:style-name="T1">Geodesia:</text:span> Calcula distancias ortodrómicas mediante la fórmula de Haversine y estima rumbos angulares en puntos cardinales (<text:span text:style-name="T6">N, NE, E, SE...</text:span>) respecto a sismos históricos y localidades. </text:p>
            </text:list-item>
            <text:list-item>
              <text:p text:style-name="P17"><text:bookmark text:name="p-rc_682cdc62ea7ae8d3-109"/><text:span text:style-name="T3">Perfil de Subducción Inteligente:</text:span><text:span text:style-name="T2"> Ejecuta un barrido lógico por 13 perfiles locales de placas (</text:span><text:span text:style-name="Source_20_Text"><text:span text:style-name="T2">slabP01.tmp</text:span></text:span><text:span text:style-name="T2"> a </text:span><text:span text:style-name="Source_20_Text"><text:span text:style-name="T2">slabP13.tmp</text:span></text:span><text:span text:style-name="T2">). Si el epicentro se encuentra a menos de 1.5° de un perfil, carga la grilla local y su topografía asociada (</text:span><text:span text:style-name="Source_20_Text"><text:span text:style-name="T2">topoPXX.tmp</text:span></text:span><text:span text:style-name="T2">). En caso de encontrarse fuera de cobertura, recurre mediante interpolación lineal de variables al modelo sismológico global </text:span><text:span text:style-name="Source_20_Text"><text:span text:style-name="T2">Slab2</text:span></text:span><text:span text:style-name="T2"> (</text:span><text:span text:style-name="Source_20_Text"><text:span text:style-name="T2">sam_slab2_dep_02.23.18.xyz</text:span></text:span><text:span text:style-name="T2">). </text:span></text:p>
            </text:list-item>
            <text:list-item>
              <text:p text:style-name="P17"><text:bookmark text:name="p-rc_682cdc62ea7ae8d3-110"/><text:span text:style-name="T3">Proyección:</text:span><text:span text:style-name="T2"> Usa </text:span><text:span text:style-name="Source_20_Text"><text:span text:style-name="T2">cartopy</text:span></text:span><text:span text:style-name="T2"> bajo la proyección </text:span><text:span text:style-name="Source_20_Text"><text:span text:style-name="T2">PlateCarree</text:span></text:span><text:span text:style-name="T2"> para superponer la matriz ráster del mapa de relieve sobre los vectores costeros y políticos. </text:span></text:p>
            </text:list-item>
          </text:list>
        </text:list-item>
      </text:list>
      <text:h text:style-name="P3" text:outline-level="3"><text:span text:style-name="T5">D. </text:span><text:span text:style-name="Source_20_Text"><text:span text:style-name="T2">lee_catalogo.py</text:span></text:span><text:span text:style-name="T5"> (Módulo de Lectura de Catálogos)</text:span></text:h>
      <text:list text:style-name="L5">
        <text:list-item>
          <text:p text:style-name="P18"><text:bookmark text:name="p-rc_682cdc62ea7ae8d3-111"/><text:span text:style-name="T3">Función:</text:span><text:span text:style-name="T2"> Script de utilería encargado de estandarizar la entrada de datos provenientes de archivos de sismicidad históricos en formato </text:span><text:span text:style-name="Source_20_Text"><text:span text:style-name="T2">.dat</text:span></text:span><text:span text:style-name="T2">. </text:span></text:p>
        </text:list-item>
        <text:list-item>
          <text:p text:style-name="P18"><text:bookmark text:name="p-rc_682cdc62ea7ae8d3-112"/><text:span text:style-name="T3">Lógica Clave:</text:span><text:span text:style-name="T2"> Utiliza </text:span><text:span text:style-name="Source_20_Text"><text:span text:style-name="T2">numpy.loadtxt</text:span></text:span><text:span text:style-name="T2"> indexando las columnas específicas de Latitud (2), Longitud (3), Profundidad (4) y Magnitud (5) para vectorizar la lectura </text:span><text:soft-page-break/><text:span text:style-name="T2">de miles de sismos en arrays de alta velocidad, transformándolos posteriormente en un DataFrame de </text:span><text:span text:style-name="Source_20_Text"><text:span text:style-name="T2">pandas</text:span></text:span><text:span text:style-name="T2"> para filtros lógicos rápidos. </text:span></text:p>
        </text:list-item>
      </text:list>
      <text:h text:style-name="P2" text:outline-level="2">3. Formato de Archivos e Intercambio Temporal</text:h>
      <text:p text:style-name="P21">El sistema utiliza un <text:span text:style-name="T1">mecanismo de comunicación desacoplado basado en archivos de texto plano</text:span> para resguardar la modularidad de los scripts:</text:p>
      <text:list text:style-name="L6">
        <text:list-item>
          <text:p text:style-name="P19"><text:span text:style-name="T3">Archivo de Intercambio:</text:span><text:span text:style-name="T2"> </text:span><text:span text:style-name="Source_20_Text"><text:span text:style-name="T2">evento_data.txt</text:span></text:span></text:p>
        </text:list-item>
        <text:list-item>
          <text:p text:style-name="P19"><text:bookmark text:name="p-rc_682cdc62ea7ae8d3-113"/><text:span text:style-name="T3">Ubicación Estricta:</text:span><text:span text:style-name="T2"> </text:span><text:span text:style-name="Source_20_Text"><text:span text:style-name="T2">/home/hriquelmez/Desarrollo/mapasopa/ploteo/evento_data.txt</text:span></text:span></text:p>
        </text:list-item>
        <text:list-item>
          <text:p text:style-name="P19"><text:bookmark text:name="p-rc_682cdc62ea7ae8d3-114"/><text:bookmark text:name="p-rc_682cdc62ea7ae8d3-115"/><text:span text:style-name="T3">Estructura:</text:span><text:span text:style-name="T2"> Consta de una única línea de texto con </text:span><text:span text:style-name="T3">19 campos</text:span><text:span text:style-name="T2"> indexados estrictamente mediante separadores de </text:span><text:span text:style-name="T3">punto y coma (</text:span><text:span text:style-name="Source_20_Text"><text:span text:style-name="T3">;</text:span></text:span><text:span text:style-name="T3">)</text:span><text:span text:style-name="T2">. </text:span></text:p>
        </text:list-item>
        <text:list-item>
          <text:p text:style-name="P28">Ejemplo de Formato Interno:</text:p>
          <text:p text:style-name="P25">Plaintext</text:p>
          <text:p text:style-name="P5"><text:span text:style-name="Source_20_Text"><text:span text:style-name="T2">2026-07-13 13:45:22;;;6.2;Mw;84;0.45;22;32.45 S;71.30 W;45 km;from location;confirmed;;2;CSN;analista_turno;Valparaiso, Chile;csn_ev2026xxxx</text:span></text:span></text:p>
        </text:list-item>
        <text:list-item>
          <text:p text:style-name="P19"><text:bookmark text:name="p-rc_682cdc62ea7ae8d3-116"/><text:span text:style-name="T3">Ciclo de vida:</text:span><text:span text:style-name="T2"> Es creado por </text:span><text:span text:style-name="Source_20_Text"><text:span text:style-name="T2">consulta_evento_individual.py</text:span></text:span><text:span text:style-name="T2">, leído inmediatamente por </text:span><text:span text:style-name="Source_20_Text"><text:span text:style-name="T2">capturar.py</text:span></text:span><text:span text:style-name="T2"> para extraer las variables físicas, y </text:span><text:span text:style-name="T3">eliminado de inmediato mediante </text:span><text:span text:style-name="Source_20_Text"><text:span text:style-name="T3">os.remove()</text:span></text:span><text:span text:style-name="T2"> una vez que los gráficos se cargan en memoria para asegurar que no existan colisiones de datos en sismos subsecuentes. </text:span></text:p>
        </text:list-item>
      </text:list>
      <text:h text:style-name="P2" text:outline-level="2">4. Requisitos de Instalación en Máquinas Nuevas</text:h>
      <text:p text:style-name="P21">Para desplegar este proyecto exitosamente en una estación de trabajo nueva con <text:span text:style-name="T1">Ubuntu o Debian</text:span>, es necesario instalar las dependencias del sistema operativo y las librerías del ecosistema científico de Python.</text:p>
      <text:h text:style-name="P4" text:outline-level="3">A. Dependencias del Sistema Operativo (APT)</text:h>
      <text:p text:style-name="P21">Debido a que las librerías geográficas requieren compiladores C subyacentes y el sistema requiere aislamiento visual, ejecuta obligatoriamente en tu terminal:</text:p>
      <text:p text:style-name="P21">Bash</text:p>
      <text:p text:style-name="P6"><text:span text:style-name="Source_20_Text"><text:span text:style-name="T2">sudo apt update</text:span></text:span></text:p>
      <text:p text:style-name="P7"><text:span text:style-name="Source_20_Text"><text:span text:style-name="T2">sudo apt install -y xterm python3-pip python3-dev libproj-dev proj-data proj-bin libgeos-dev</text:span></text:span></text:p>
      <text:p text:style-name="P9"><text:bookmark text:name="p-rc_682cdc62ea7ae8d3-117"/><text:soft-page-break/><text:span text:style-name="T3">Importante:</text:span><text:span text:style-name="T2"> </text:span><text:span text:style-name="Source_20_Text"><text:span text:style-name="T2">xterm</text:span></text:span><text:span text:style-name="T2"> es mandatorio en entornos Debian/Ubuntu sin importar el gestor de escritorio (GNOME, XFCE, etc.), ya que provee la ventana flotante estándar utilizada por </text:span><text:span text:style-name="Source_20_Text"><text:span text:style-name="T2">newpt.sh</text:span></text:span><text:span text:style-name="T2">. </text:span></text:p>
      <text:h text:style-name="P4" text:outline-level="3">B. Dependencias de Python (PIP / Entorno Virtual)</text:h>
      <text:p text:style-name="P21">Se recomienda instalar los paquetes científicos en sus versiones estables. Puedes hacerlo directo en el sistema o dentro de tu entorno virtual:</text:p>
      <text:p text:style-name="P21">Bash</text:p>
      <text:p text:style-name="P6"><text:span text:style-name="Source_20_Text"><text:span text:style-name="T2">pip3 install numpy pandas matplotlib cartopy psycopg2-binary pillow pyperclip</text:span></text:span></text:p>
      <text:h text:style-name="P4" text:outline-level="3">Tabla de Resumen de Módulos Críticos y su Función:</text:h>
      <table:table table:name="Table1" table:style-name="Table1">
        <table:table-column table:style-name="Table1.A"/>
        <table:table-column table:style-name="Table1.B"/>
        <table:table-header-rows>
          <table:table-row>
            <table:table-cell table:style-name="Table1.A1" office:value-type="string">
              <text:p text:style-name="P11"><text:span text:style-name="Strong_20_Emphasis"><text:span text:style-name="T2">Módulo Python</text:span></text:span></text:p>
            </table:table-cell>
            <table:table-cell table:style-name="Table1.A1" office:value-type="string">
              <text:p text:style-name="P11"><text:span text:style-name="Strong_20_Emphasis"><text:span text:style-name="T2">Utilidad en el Proyecto</text:span></text:span></text:p>
            </table:table-cell>
          </table:table-row>
        </table:table-header-rows>
        <table:table-row>
          <table:table-cell table:style-name="Table1.A1" office:value-type="string">
            <text:p text:style-name="P10"><text:span text:style-name="Source_20_Text"><text:span text:style-name="T2">psycopg2-binary</text:span></text:span></text:p>
          </table:table-cell>
          <table:table-cell table:style-name="Table1.A1" office:value-type="string">
            <text:p text:style-name="P12"><text:bookmark text:name="p-rc_682cdc62ea7ae8d3-118"/>Conexión e interacción con las bases de datos PostgreSQL de SeisComP. <text:span text:style-name="T4"/></text:p>
          </table:table-cell>
        </table:table-row>
        <table:table-row>
          <table:table-cell table:style-name="Table1.A1" office:value-type="string">
            <text:p text:style-name="P10"><text:span text:style-name="Source_20_Text"><text:span text:style-name="T2">cartopy</text:span></text:span></text:p>
          </table:table-cell>
          <table:table-cell table:style-name="Table1.A1" office:value-type="string">
            <text:p text:style-name="P12"><text:bookmark text:name="p-rc_682cdc62ea7ae8d3-119"/>Gestión de proyecciones cartográficas, líneas de costa y fronteras. <text:span text:style-name="T4"/></text:p>
          </table:table-cell>
        </table:table-row>
        <table:table-row>
          <table:table-cell table:style-name="Table1.A1" office:value-type="string">
            <text:p text:style-name="P10"><text:span text:style-name="Source_20_Text"><text:span text:style-name="T2">matplotlib</text:span></text:span></text:p>
          </table:table-cell>
          <table:table-cell table:style-name="Table1.A1" office:value-type="string">
            <text:p text:style-name="P12"><text:bookmark text:name="p-rc_682cdc62ea7ae8d3-120"/>Generación de las ventanas gráficas interactivas y perfiles 2D. <text:span text:style-name="T4"/></text:p>
          </table:table-cell>
        </table:table-row>
        <table:table-row>
          <table:table-cell table:style-name="Table1.A1" office:value-type="string">
            <text:p text:style-name="P10"><text:span text:style-name="Source_20_Text"><text:span text:style-name="T2">numpy</text:span></text:span><text:span text:style-name="T2"> / </text:span><text:span text:style-name="Source_20_Text"><text:span text:style-name="T2">pandas</text:span></text:span></text:p>
          </table:table-cell>
          <table:table-cell table:style-name="Table1.A1" office:value-type="string">
            <text:p text:style-name="P12"><text:bookmark text:name="p-rc_682cdc62ea7ae8d3-121"/>Procesamiento analítico rápido de catálogos e interpolación de matrices del Slab. <text:span text:style-name="T4"/></text:p>
          </table:table-cell>
        </table:table-row>
        <table:table-row>
          <table:table-cell table:style-name="Table1.A6" office:value-type="string">
            <text:p text:style-name="P10">adjustText</text:p>
          </table:table-cell>
          <table:table-cell table:style-name="Table1.A6" office:value-type="string">
            <text:p text:style-name="P12">Este módulo analiza la posición de todos los textos en el mapa y, mediante un algoritmo iterativo, los separa de forma inteligente para que ninguno se toque, trazando incluso una pequeña línea guía si se alejan mucho del punto de origen.</text:p>
          </table:table-cell>
        </table:table-row>
        <table:table-row>
          <table:table-cell table:style-name="Table1.A1" office:value-type="string">
            <text:p text:style-name="P10"><text:span text:style-name="Source_20_Text"><text:span text:style-name="T2">pillow</text:span></text:span><text:span text:style-name="T2"> (</text:span><text:span text:style-name="Source_20_Text"><text:span text:style-name="T2">PIL</text:span></text:span><text:span text:style-name="T2">)</text:span></text:p>
          </table:table-cell>
          <table:table-cell table:style-name="Table1.A1" office:value-type="string">
            <text:p text:style-name="P10"><text:bookmark text:name="p-rc_682cdc62ea7ae8d3-122"/><text:span text:style-name="T2">Renderizado y mapeo dinámico del archivo ráster de relieve pesado </text:span><text:span text:style-name="Source_20_Text"><text:span text:style-name="T2">.tif</text:span></text:span><text:span text:style-name="T2">. </text:span></text:p>
          </table:table-cell>
        </table:table-row>
      </table:table>
      <text:h text:style-name="P2" text:outline-level="2">5. Consideraciones Claves para el Administrador</text:h>
      <text:list text:style-name="L7">
        <text:list-item>
          <text:p text:style-name="P20"><text:bookmark text:name="p-rc_682cdc62ea7ae8d3-123"/><text:span text:style-name="T3">Rutas Absolutas (Hardcoded):</text:span><text:span text:style-name="T2"> El script </text:span><text:span text:style-name="Source_20_Text"><text:span text:style-name="T2">newpt.sh</text:span></text:span><text:span text:style-name="T2"> y </text:span><text:span text:style-name="Source_20_Text"><text:span text:style-name="T2">consulta_evento_individual.py</text:span></text:span><text:span text:style-name="T2"> tienen configurada de forma fija la ruta </text:span><text:soft-page-break/><text:span text:style-name="Source_20_Text"><text:span text:style-name="T2">/home/hriquelmez/Desarrollo/mapasopa/ploteo/</text:span></text:span><text:span text:style-name="T2">. Si en las máquinas de producción el usuario cambia (ej. </text:span><text:span text:style-name="Source_20_Text"><text:span text:style-name="T2">/home/sysop/</text:span></text:span><text:span text:style-name="T2">), se deben modificar estas líneas al inicio de los archivos para que el validador de Bash </text:span><text:span text:style-name="Source_20_Text"><text:span text:style-name="T2">-f</text:span></text:span><text:span text:style-name="T2"> localice el intercambio de datos. </text:span></text:p>
        </text:list-item>
        <text:list-item>
          <text:p text:style-name="P26"><text:span text:style-name="T1">Archivos Estáticos Requeridos:</text:span> Para que el graficador funcione, deben existir en la misma carpeta los archivos complementarios que no se detallaron en el código:</text:p>
          <text:list>
            <text:list-item>
              <text:p text:style-name="P20"><text:bookmark text:name="p-rc_682cdc62ea7ae8d3-124"/><text:span text:style-name="Source_20_Text"><text:span text:style-name="T2">NE2_LR_LC_SR_W_DR.tif</text:span></text:span><text:span text:style-name="T2"> (Relieve ráster de fondo). </text:span></text:p>
            </text:list-item>
            <text:list-item>
              <text:p text:style-name="P20"><text:bookmark text:name="p-rc_682cdc62ea7ae8d3-125"/><text:span text:style-name="Source_20_Text"><text:span text:style-name="T2">localidades.csv</text:span></text:span><text:span text:style-name="T2"> (Base de datos de ciudades y latitudes/longitudes para cálculo de distancias de referencia). </text:span></text:p>
            </text:list-item>
            <text:list-item>
              <text:p text:style-name="P20"><text:bookmark text:name="p-rc_682cdc62ea7ae8d3-126"/><text:span text:style-name="Source_20_Text"><text:span text:style-name="T2">base_2023_2026.dat</text:span></text:span><text:span text:style-name="T2"> (Catálogo histórico de sismicidad de fondo). </text:span></text:p>
            </text:list-item>
            <text:list-item>
              <text:p text:style-name="P20"><text:bookmark text:name="p-rc_682cdc62ea7ae8d3-127"/><text:span text:style-name="T2">Carpeta </text:span><text:span text:style-name="Source_20_Text"><text:span text:style-name="T2">./grillas/</text:span></text:span><text:span text:style-name="T2"> (Conteniendo los archivos </text:span><text:span text:style-name="Source_20_Text"><text:span text:style-name="T2">.tmp</text:span></text:span><text:span text:style-name="T2"> de los perfiles y el archivo global </text:span><text:span text:style-name="Source_20_Text"><text:span text:style-name="T2">.xyz</text:span></text:span><text:span text:style-name="T2"> de Slab2). </text:span></text:p>
            </text:list-item>
          </text:list>
        </text:list-item>
        <text:list-item>
          <text:p text:style-name="P26"><text:span text:style-name="T1">Permisos de Ejecución:</text:span> Asegúrate de otorgar permisos de ejecución al script lanzador en cada instalación nueva:</text:p>
          <text:p text:style-name="P26">Bash</text:p>
          <text:p text:style-name="P8"><text:span text:style-name="Source_20_Text"><text:span text:style-name="T2">chmod +x /ruta/al/proyecto/newpt.sh</text:span></text:spa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13T14:05:16.261650149</meta:creation-date>
    <dc:date>2026-07-13T14:45:28.842287115</dc:date>
    <meta:editing-duration>PT40M12S</meta:editing-duration>
    <meta:editing-cycles>3</meta:editing-cycles>
    <meta:generator>LibreOffice/24.2.7.2$Linux_X86_64 LibreOffice_project/420$Build-2</meta:generator>
    <meta:document-statistic meta:table-count="1" meta:image-count="0" meta:object-count="0" meta:page-count="5" meta:paragraph-count="74" meta:word-count="1110" meta:character-count="7670" meta:non-whitespace-character-count="6635"/>
  </office:meta>
</office:document-meta>
</file>