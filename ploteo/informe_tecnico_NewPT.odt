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11in"/>
    </style:style>
    <style:style style:name="Table1.B" style:family="table-column">
      <style:table-column-properties style:column-width="2.5438in"/>
    </style:style>
    <style:style style:name="Table1.C" style:family="table-column">
      <style:table-column-properties style:column-width="3.1701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5" style:family="paragraph" style:parent-style-name="Preformatted_20_Text">
      <style:paragraph-properties fo:margin-top="0in" fo:margin-bottom="0in" style:contextual-spacing="false" fo:line-height="114%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1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2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4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6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7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8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0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1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2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3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4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font-name-asian="Google Sans Text" style:font-name-complex="Google Sans Text"/>
    </style:style>
    <style:style style:name="T5" style:family="text">
      <style:text-properties style:font-name="Google Sans Text" officeooo:rsid="001d997f"/>
    </style:style>
    <style:style style:name="T6" style:family="text">
      <style:text-properties style:font-name="Google Sans Text" officeooo:rsid="001ee1ae"/>
    </style:style>
    <style:style style:name="T7" style:family="text">
      <style:text-properties style:font-name="Google Sans Text" officeooo:rsid="0020972a"/>
    </style:style>
    <style:style style:name="T8" style:family="text">
      <style:text-properties style:font-name="Google Sans"/>
    </style:style>
    <style:style style:name="T9" style:family="text">
      <style:text-properties officeooo:rsid="001d997f"/>
    </style:style>
    <style:style style:name="T10" style:family="text">
      <style:text-properties officeooo:rsid="001ee1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e Técnico de Proyecto: Sistema de Perfiles Sísmicos Automatizados (NewPT)</text:h>
      <text:p text:style-name="P10">Este informe detalla la arquitectura de integración, flujo de scripts, dependencias y el procedimiento de despliegue para el sistema NewPT. El software está optimizado para su instalación y ejecución local en producción sobre tres estaciones de trabajo con sistema operativo <text:span text:style-name="T1">Debian</text:span>.</text:p>
      <text:h text:style-name="P2" text:outline-level="2">1. Arquitectura de Scripts y Flujo de Trabajo Real</text:h>
      <text:p text:style-name="P10">NewPT opera mediante un flujo directo de eventos gatillado<text:span text:style-name="T9">s</text:span> desde <text:span text:style-name="T1">SeisComP6</text:span> que se propaga a través de un script en Bash, consultas SQL en Python a la base de datos de adquisición, y finalmente el renderizado de gráficos de perfiles perpendiculares y vistas en planta.</text:p>
      <text:p text:style-name="P10">Plaintext</text:p>
      <text:p text:style-name="P4"><text:span text:style-name="Source_20_Text"><text:s text:c="7"/></text:span><text:span text:style-name="Source_20_Text"><text:span text:style-name="T2">[ SeisComP6: Origen Preferido ]</text:span></text:span></text:p>
      <text:p text:style-name="P5"><text:span text:style-name="Source_20_Text"><text:s text:c="21"/>│</text:span></text:p>
      <text:p text:style-name="P5"><text:span text:style-name="Source_20_Text"><text:s text:c="9"/></text:span><text:span text:style-name="Source_20_Text"><text:span text:style-name="T2">(Envía EVENT_ID al llamar)</text:span></text:span></text:p>
      <text:p text:style-name="P5"><text:span text:style-name="Source_20_Text"><text:s text:c="21"/>│</text:span></text:p>
      <text:p text:style-name="P5"><text:span text:style-name="Source_20_Text"><text:s text:c="14"/></text:span><text:span text:style-name="Source_20_Text"><text:span text:style-name="T2">[ newpt.sh ] <text:s text:c="2"/>&lt;--- (Se encarga de limpiar instancias previas y levantar terminal xterm)</text:span></text:span></text:p>
      <text:p text:style-name="P5"><text:span text:style-name="Source_20_Text"><text:s text:c="21"/>│</text:span></text:p>
      <text:p text:style-name="P5"><text:span text:style-name="Source_20_Text"><text:s text:c="10"/></text:span><text:span text:style-name="Source_20_Text"><text:span text:style-name="T2">[ consulta_evento.py ] <text:s/>&lt;--- (Conecta a la BD de SeisComP en 10.54.217.69)</text:span></text:span></text:p>
      <text:p text:style-name="P5"><text:span text:style-name="Source_20_Text"><text:s text:c="21"/>│</text:span></text:p>
      <text:p text:style-name="P5"><text:span text:style-name="Source_20_Text"><text:s text:c="21"/>├──</text:span><text:span text:style-name="Source_20_Text"><text:span text:style-name="T2">&gt; Genera archivo temporal: /</text:span></text:span><text:span text:style-name="Source_20_Text"><text:span text:style-name="T5">rutascripts</text:span></text:span><text:span text:style-name="Source_20_Text"><text:span text:style-name="T2">/evento_data.txt</text:span></text:span></text:p>
      <text:p text:style-name="P5"><text:span text:style-name="Source_20_Text"><text:s text:c="21"/>│</text:span></text:p>
      <text:p text:style-name="P5"><text:span text:style-name="Source_20_Text"><text:s text:c="14"/></text:span><text:span text:style-name="Source_20_Text"><text:span text:style-name="T2">[ capturar.py ] &lt;--- (Script gráfico principal)</text:span></text:span></text:p>
      <text:p text:style-name="P5"><text:span text:style-name="Source_20_Text"><text:s text:c="21"/>│</text:span></text:p>
      <text:p text:style-name="P5"><text:span text:style-name="Source_20_Text"><text:s text:c="21"/>├──</text:span><text:span text:style-name="Source_20_Text"><text:span text:style-name="T2">&gt; Lee: evento_data.txt</text:span></text:span></text:p>
      <text:p text:style-name="P5"><text:span text:style-name="Source_20_Text"><text:s text:c="21"/>├──</text:span><text:span text:style-name="Source_20_Text"><text:span text:style-name="T2">&gt; Lee background: base_2023_2026.dat (Usando la lógica de lee_catalogo.py)</text:span></text:span></text:p>
      <text:p text:style-name="P5"><text:span text:style-name="Source_20_Text"><text:s text:c="21"/>├──</text:span><text:span text:style-name="Source_20_Text"><text:span text:style-name="T2">&gt; Lee grillas: /grillas/slabPXX.tmp, /grillas/topoPXX.tmp, sam_slab2...xyz</text:span></text:span></text:p>
      <text:p text:style-name="P5"><text:span text:style-name="Source_20_Text"><text:s text:c="21"/>├──</text:span><text:span text:style-name="Source_20_Text"><text:span text:style-name="T2">&gt; Lee relieve: NE2_LR_LC_SR_W_DR.tif</text:span></text:span></text:p>
      <text:p text:style-name="P5"><text:span text:style-name="Source_20_Text"><text:s text:c="21"/>└──</text:span><text:span text:style-name="Source_20_Text"><text:span text:style-name="T2">&gt; Lee puntos geográficos: localidades.csv</text:span></text:span></text:p>
      <text:h text:style-name="P3" text:outline-level="3"><text:span text:style-name="T8">A. Script Controlador de Eventos: </text:span><text:span text:style-name="Source_20_Text"><text:span text:style-name="T2">newpt.sh</text:span></text:span><text:span text:style-name="T8"> (Bash)</text:span></text:h>
      <text:list text:style-name="L6">
        <text:list-item>
          <text:p text:style-name="P11"><text:bookmark text:name="p-rc_022ce3c7b5e17cf2-199"/><text:span text:style-name="T1">Propósito:</text:span> <text:span text:style-name="T9">Realizar </text:span>la ejecución e inicialización visual del flujo del evento. </text:p>
        </text:list-item>
        <text:list-item>
          <text:p text:style-name="P14">Flujo Lógico:</text:p>
          <text:list>
            <text:list-item>
              <text:p text:style-name="P20"><text:bookmark text:name="p-rc_022ce3c7b5e17cf2-200"/><text:soft-page-break/><text:span text:style-name="T2">Realiza una limpieza de recursos en el sistema local, cerrando cualquier ventana de visualización previa de </text:span><text:span text:style-name="Source_20_Text"><text:span text:style-name="T2">capturar.py</text:span></text:span><text:span text:style-name="T2"> o terminales </text:span><text:span text:style-name="Source_20_Text"><text:span text:style-name="T2">xterm</text:span></text:span><text:span text:style-name="T2"> anteriores de NewPT que hayan quedado abiertas. </text:span></text:p>
            </text:list-item>
            <text:list-item>
              <text:p text:style-name="P20"><text:bookmark text:name="p-rc_022ce3c7b5e17cf2-201"/><text:span text:style-name="T2">Levanta una terminal de visualización interactiva </text:span><text:span text:style-name="Source_20_Text"><text:span text:style-name="T2">xterm</text:span></text:span><text:span text:style-name="T2"> ejecutando </text:span><text:span text:style-name="Source_20_Text"><text:span text:style-name="T2">consulta_evento.py</text:span></text:span><text:span text:style-name="T2"> pasándole el argumento </text:span><text:span text:style-name="Source_20_Text"><text:span text:style-name="T2">$EVENT_ID</text:span></text:span><text:span text:style-name="T2"> que viene de SeisComP6. </text:span></text:p>
            </text:list-item>
            <text:list-item>
              <text:p text:style-name="P20"><text:bookmark text:name="p-rc_022ce3c7b5e17cf2-202"/><text:span text:style-name="T2">Si la extracción es exitosa y se genera el archivo de intercambio temporal </text:span><text:span text:style-name="Source_20_Text"><text:span text:style-name="T2">evento_data.txt</text:span></text:span><text:span text:style-name="T2">, invoca a </text:span><text:span text:style-name="Source_20_Text"><text:span text:style-name="T2">capturar.py</text:span></text:span><text:span text:style-name="T2"> para generar la interfaz gráfica de los perfiles. </text:span></text:p>
            </text:list-item>
          </text:list>
        </text:list-item>
      </text:list>
      <text:h text:style-name="P3" text:outline-level="3"><text:span text:style-name="T8">B. Módulo de Base de Datos: </text:span><text:span text:style-name="Source_20_Text"><text:span text:style-name="T2">consulta_evento.py</text:span></text:span><text:span text:style-name="T8"> (Python)</text:span></text:h>
      <text:list text:style-name="L7">
        <text:list-item>
          <text:p text:style-name="P21"><text:bookmark text:name="p-rc_022ce3c7b5e17cf2-203"/><text:span text:style-name="T3">Propósito:</text:span><text:span text:style-name="T2"> Extraer los parámetros de la base de datos Postgres de SeisComP (</text:span><text:span text:style-name="Source_20_Text"><text:span text:style-name="T2">seiscomp</text:span></text:span><text:span text:style-name="T2"> en la IP </text:span><text:span text:style-name="Source_20_Text"><text:span text:style-name="T2">10.54.217.69</text:span></text:span><text:span text:style-name="T2">) para el origen seleccionado. </text:span></text:p>
        </text:list-item>
        <text:list-item>
          <text:p text:style-name="P15">Flujo Lógico:</text:p>
          <text:list>
            <text:list-item>
              <text:p text:style-name="P21"><text:bookmark text:name="p-rc_022ce3c7b5e17cf2-204"/><text:span text:style-name="T2">Analiza el formato del ID de entrada (</text:span><text:span text:style-name="Source_20_Text"><text:span text:style-name="T2">Origin/</text:span></text:span><text:span text:style-name="T2"> o </text:span><text:span text:style-name="Source_20_Text"><text:span text:style-name="T2">NLL.</text:span></text:span><text:span text:style-name="T2">) para extraer </text:span><text:span text:style-name="T5">el </text:span><text:span text:style-name="T2">tiempo de creación. </text:span></text:p>
            </text:list-item>
            <text:list-item>
              <text:p text:style-name="P12"><text:bookmark text:name="p-rc_022ce3c7b5e17cf2-205"/>Ejecuta una consulta SQL en base a la fecha de creación en un intervalo de tolerancia de $\pm3$ segundos para capturar toda la información del sismo. </text:p>
            </text:list-item>
            <text:list-item>
              <text:p text:style-name="P21"><text:bookmark text:name="p-rc_022ce3c7b5e17cf2-206"/><text:span text:style-name="T2">Formatea de manera estricta los datos simulando el orden de 19 campos delimitados por punto y coma (</text:span><text:span text:style-name="Source_20_Text"><text:span text:style-name="T2">;</text:span></text:span><text:span text:style-name="T2">), calculando la latitud y longitud con sufijos cardinales absolutos (p. ej., </text:span><text:span text:style-name="Source_20_Text"><text:span text:style-name="T2">S</text:span></text:span><text:span text:style-name="T2">, </text:span><text:span text:style-name="Source_20_Text"><text:span text:style-name="T2">N</text:span></text:span><text:span text:style-name="T2">, </text:span><text:span text:style-name="Source_20_Text"><text:span text:style-name="T2">W</text:span></text:span><text:span text:style-name="T2">, </text:span><text:span text:style-name="Source_20_Text"><text:span text:style-name="T2">E</text:span></text:span><text:span text:style-name="T2">). </text:span><text:span text:style-name="T5">Este es e formato de entrada requerido para el script de ploteo.</text:span><text:span text:style-name="T2"> </text:span></text:p>
            </text:list-item>
            <text:list-item>
              <text:p text:style-name="P21"><text:bookmark text:name="p-rc_022ce3c7b5e17cf2-207"/><text:span text:style-name="T2">Genera el archivo plano de intercambio en la ruta absoluta estricta del entorno local: </text:span><text:span text:style-name="Source_20_Text"><text:span text:style-name="T2">/</text:span></text:span><text:span text:style-name="Source_20_Text"><text:span text:style-name="T5">rutascripts</text:span></text:span><text:span text:style-name="Source_20_Text"><text:span text:style-name="T2">/evento_data.txt</text:span></text:span><text:span text:style-name="T2"> </text:span></text:p>
            </text:list-item>
          </text:list>
        </text:list-item>
      </text:list>
      <text:h text:style-name="P3" text:outline-level="3"><text:span text:style-name="T8">C. Módulo de Lectura del Catálogo: </text:span><text:span text:style-name="Source_20_Text"><text:span text:style-name="T2">lee_catalogo.py</text:span></text:span><text:span text:style-name="T8"> (Python)</text:span></text:h>
      <text:list text:style-name="L8">
        <text:list-item>
          <text:p text:style-name="P22"><text:bookmark text:name="p-rc_022ce3c7b5e17cf2-208"/><text:span text:style-name="T3">Propósito:</text:span><text:span text:style-name="T2"> Estandarizar la lectura de datos de sismicidad de fondo en formato </text:span><text:span text:style-name="Source_20_Text"><text:span text:style-name="T2">.dat</text:span></text:span><text:span text:style-name="T2">. </text:span></text:p>
        </text:list-item>
        <text:list-item>
          <text:p text:style-name="P16">Flujo Lógico:</text:p>
          <text:list>
            <text:list-item>
              <text:p text:style-name="P22"><text:bookmark text:name="p-rc_022ce3c7b5e17cf2-209"/><text:span text:style-name="T2">Lee el archivo de background (</text:span><text:span text:style-name="Source_20_Text"><text:span text:style-name="T2">base_2023_2026.dat</text:span></text:span><text:span text:style-name="T2">), extrayendo de forma posicional las columnas: latitud (columna 2), longitud (columna 3), profundidad (columna 4), magnitud (columna 5), tipo de magnitud </text:span><text:soft-page-break/><text:span text:style-name="T2">(columna 6) y </text:span><text:span text:style-name="T5">si fue percibido o no</text:span><text:span text:style-name="T2"> (columna 7). </text:span><text:span text:style-name="T5">En relación al ultimo parámetro mencionado se señala que para este proyecto no es relevante ya que solo se va a plotear</text:span><text:span text:style-name="T2">. </text:span></text:p>
            </text:list-item>
            <text:list-item>
              <text:p text:style-name="P22"><text:bookmark text:name="p-rc_022ce3c7b5e17cf2-210"/><text:span text:style-name="T2">Retorna un objeto estructurado </text:span><text:span text:style-name="Source_20_Text"><text:span text:style-name="T2">pandas.DataFrame</text:span></text:span><text:span text:style-name="T2"> para su manipulación sin afectar la lógica del resto de los scripts si cambian los formatos de origen. </text:span></text:p>
            </text:list-item>
          </text:list>
        </text:list-item>
      </text:list>
      <text:h text:style-name="P3" text:outline-level="3"><text:span text:style-name="T8">D. Renderizador Gráfico Principal: </text:span><text:span text:style-name="Source_20_Text"><text:span text:style-name="T2">capturar.py</text:span></text:span><text:span text:style-name="T8"> (Python)</text:span></text:h>
      <text:list text:style-name="L9">
        <text:list-item>
          <text:p text:style-name="P13"><text:bookmark text:name="p-rc_022ce3c7b5e17cf2-211"/><text:span text:style-name="T1">Propósito:</text:span> Generar e interactuar con la ventana gráfica <text:span text:style-name="T10">de mapas en planta y pérfil para el evento seleccionado</text:span>. </text:p>
        </text:list-item>
        <text:list-item>
          <text:p text:style-name="P17">Flujo Lógico:</text:p>
          <text:list>
            <text:list-item>
              <text:p text:style-name="P23"><text:bookmark text:name="p-rc_022ce3c7b5e17cf2-212"/><text:span text:style-name="T3">Lectura de Parámetros:</text:span><text:span text:style-name="T2"> Carga la información del sismo actual leyendo el archivo temporal </text:span><text:span text:style-name="Source_20_Text"><text:span text:style-name="T2">evento_data.txt</text:span></text:span><text:span text:style-name="T2"> de su directorio de trabajo. </text:span></text:p>
            </text:list-item>
            <text:list-item>
              <text:p text:style-name="P23"><text:bookmark text:name="p-rc_022ce3c7b5e17cf2-213"/><text:span text:style-name="T3">Carga del Background:</text:span><text:span text:style-name="T2"> Filtra espacialmente los sismos históricos cargando </text:span><text:span text:style-name="Source_20_Text"><text:span text:style-name="T2">base_2023_2026.dat</text:span></text:span><text:span text:style-name="T2"> en un rango dinámico de </text:span><text:span text:style-name="T6">mas menos 2</text:span><text:span text:style-name="T2">.5</text:span><text:span text:style-name="T6">°</text:span><text:span text:style-name="T2"> alrededor del epicentro para visualizarlos en color gris. </text:span></text:p>
            </text:list-item>
            <text:list-item>
              <text:p text:style-name="P17">Selección del Perfil de Placa (Slab) y Topografía:</text:p>
              <text:list>
                <text:list-item>
                  <text:p text:style-name="P23"><text:bookmark text:name="p-rc_022ce3c7b5e17cf2-214"/><text:span text:style-name="T2">Recorre dinámicamente perfiles del </text:span><text:span text:style-name="Source_20_Text"><text:span text:style-name="T2">1</text:span></text:span><text:span text:style-name="T2"> al </text:span><text:span text:style-name="Source_20_Text"><text:span text:style-name="T2">13</text:span></text:span><text:span text:style-name="T2"> buscando archivos en </text:span><text:span text:style-name="Source_20_Text"><text:span text:style-name="T2">./grillas/slabP{01-13}.tmp</text:span></text:span><text:span text:style-name="T2">. </text:span></text:p>
                </text:list-item>
                <text:list-item>
                  <text:p text:style-name="P13"><text:bookmark text:name="p-rc_022ce3c7b5e17cf2-215"/>Determina el perfil óptimo calculando la distancia menor a 1.5<text:span text:style-name="T10">°</text:span>. </text:p>
                </text:list-item>
                <text:list-item>
                  <text:p text:style-name="P23"><text:bookmark text:name="p-rc_022ce3c7b5e17cf2-216"/><text:span text:style-name="T2">Si no encuentra cobertura local, acude a la grilla global </text:span><text:span text:style-name="Source_20_Text"><text:span text:style-name="T2">./grillas/sam_slab2_dep_02.23.18.xyz</text:span></text:span><text:span text:style-name="T2"> para proyectar el contacto. </text:span></text:p>
                </text:list-item>
                <text:list-item>
                  <text:p text:style-name="P23"><text:bookmark text:name="p-rc_022ce3c7b5e17cf2-217"/><text:span text:style-name="T2">Carga y suaviza la topografía desde </text:span><text:span text:style-name="Source_20_Text"><text:span text:style-name="T2">./grillas/topoP{XX}.tmp</text:span></text:span><text:span text:style-name="T2">. </text:span></text:p>
                </text:list-item>
              </text:list>
            </text:list-item>
            <text:list-item>
              <text:p text:style-name="P23"><text:bookmark text:name="p-rc_022ce3c7b5e17cf2-218"/><text:span text:style-name="T3">Vista en Planta:</text:span><text:span text:style-name="T2"> Proyecta la sismicidad y relieve utilizando el archivo raster </text:span><text:span text:style-name="Source_20_Text"><text:span text:style-name="T2">NE2_LR_LC_SR_W_DR.tif</text:span></text:span><text:span text:style-name="T2"> como fondo y grafica las localidades leyendo </text:span><text:span text:style-name="Source_20_Text"><text:span text:style-name="T2">localidades.csv</text:span></text:span><text:span text:style-name="T2">. </text:span></text:p>
            </text:list-item>
            <text:list-item>
              <text:p text:style-name="P23"><text:bookmark text:name="p-rc_022ce3c7b5e17cf2-219"/><text:span text:style-name="T3">Perfil Perpendicular (W - E):</text:span><text:span text:style-name="T2"> Proyecta la profundidad de la sismicidad histórica, el hipocentro del sismo actual y la curva de subducción del Slab corregida por desfase (</text:span><text:span text:style-name="Source_20_Text"><text:span text:style-name="T2">delta_lon</text:span></text:span><text:span text:style-name="T2">). Si el sismo es exterior al área local (fuera del rango -45.0</text:span><text:span text:style-name="T6">°</text:span><text:span text:style-name="T2"> a -18.0</text:span><text:span text:style-name="T6">°</text:span><text:span text:style-name="T2">), deshabilita el perfil y muestra la alerta correspondiente </text:span><text:span text:style-name="T6">(mensaje de “PERFIL NO DISPONIBLE”)</text:span><text:span text:style-name="T2">. </text:span></text:p>
            </text:list-item>
          </text:list>
        </text:list-item>
      </text:list>
      <text:h text:style-name="P2" text:outline-level="2"><text:soft-page-break/>2. Archivos de Datos Involucrados</text:h>
      <text:p text:style-name="P10">Para que la migración a las nuevas máquinas Debian locales funcione, se debe asegurar que existan los siguientes archivos estructurados en los directorios de trabajo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<text:span text:style-name="Strong_20_Emphasis"><text:span text:style-name="T2">Tipo de Archivo</text:span></text:span></text:p>
            </table:table-cell>
            <table:table-cell table:style-name="Table1.A1" office:value-type="string">
              <text:p text:style-name="P7"><text:span text:style-name="Strong_20_Emphasis"><text:span text:style-name="T2">Nombre exacto / Patrón de Ruta</text:span></text:span></text:p>
            </table:table-cell>
            <table:table-cell table:style-name="Table1.A1" office:value-type="string">
              <text:p text:style-name="P7"><text:span text:style-name="Strong_20_Emphasis"><text:span text:style-name="T2">Propósito en el Proyecto</text:span></text:span></text:p>
            </table:table-cell>
          </table:table-row>
        </table:table-header-rows>
        <table:table-row>
          <table:table-cell table:style-name="Table1.A1" office:value-type="string">
            <text:p text:style-name="P8">Script Bash</text:p>
          </table:table-cell>
          <table:table-cell table:style-name="Table1.A1" office:value-type="string">
            <text:p text:style-name="P6"><text:span text:style-name="Source_20_Text"><text:span text:style-name="T2">newpt.sh</text:span></text:span><text:bookmark text:name="p-rc_022ce3c7b5e17cf2-220"/><text:span text:style-name="T4"/></text:p>
          </table:table-cell>
          <table:table-cell table:style-name="Table1.A1" office:value-type="string">
            <text:p text:style-name="P6"><text:bookmark text:name="p-rc_022ce3c7b5e17cf2-221"/><text:span text:style-name="T2">Lanzador de la terminal </text:span><text:span text:style-name="Source_20_Text"><text:span text:style-name="T2">xterm</text:span></text:span><text:span text:style-name="T2"> y controlador del flujo de scripts. </text:span></text:p>
          </table:table-cell>
        </table:table-row>
        <table:table-row>
          <table:table-cell table:style-name="Table1.A1" office:value-type="string">
            <text:p text:style-name="P8">Scripts Python</text:p>
          </table:table-cell>
          <table:table-cell table:style-name="Table1.A1" office:value-type="string">
            <text:p text:style-name="P6"><text:span text:style-name="Source_20_Text"><text:span text:style-name="T2">consulta_evento.py</text:span></text:span><text:span text:style-name="T2">, </text:span><text:span text:style-name="Source_20_Text"><text:span text:style-name="T2">capturar.py</text:span></text:span><text:span text:style-name="T2">, </text:span><text:span text:style-name="Source_20_Text"><text:span text:style-name="T2">lee_catalogo.py</text:span></text:span><text:bookmark text:name="p-rc_022ce3c7b5e17cf2-222"/></text:p>
          </table:table-cell>
          <table:table-cell table:style-name="Table1.A1" office:value-type="string">
            <text:p text:style-name="P9"><text:bookmark text:name="p-rc_022ce3c7b5e17cf2-223"/>Extracción, renderizado matemático y lectura del background. <text:span text:style-name="T4"/></text:p>
          </table:table-cell>
        </table:table-row>
        <table:table-row>
          <table:table-cell table:style-name="Table1.A1" office:value-type="string">
            <text:p text:style-name="P8">Intercambio</text:p>
          </table:table-cell>
          <table:table-cell table:style-name="Table1.A1" office:value-type="string">
            <text:p text:style-name="P6"><text:span text:style-name="Source_20_Text"><text:span text:style-name="T2">/</text:span></text:span><text:span text:style-name="Source_20_Text"><text:span text:style-name="T7">rutascripts</text:span></text:span><text:span text:style-name="Source_20_Text"><text:span text:style-name="T2">/evento_data.txt</text:span></text:span><text:bookmark text:name="p-rc_022ce3c7b5e17cf2-224"/></text:p>
          </table:table-cell>
          <table:table-cell table:style-name="Table1.A1" office:value-type="string">
            <text:p text:style-name="P9"><text:bookmark text:name="p-rc_022ce3c7b5e17cf2-225"/>Archivo temporal con los datos formateados del sismo preferido. <text:span text:style-name="T4"/></text:p>
          </table:table-cell>
        </table:table-row>
        <table:table-row>
          <table:table-cell table:style-name="Table1.A1" office:value-type="string">
            <text:p text:style-name="P8">Background</text:p>
          </table:table-cell>
          <table:table-cell table:style-name="Table1.A1" office:value-type="string">
            <text:p text:style-name="P6"><text:span text:style-name="Source_20_Text"><text:span text:style-name="T2">base_2023_2026.dat</text:span></text:span><text:bookmark text:name="p-rc_022ce3c7b5e17cf2-226"/><text:span text:style-name="T4"/></text:p>
          </table:table-cell>
          <table:table-cell table:style-name="Table1.A1" office:value-type="string">
            <text:p text:style-name="P9"><text:bookmark text:name="p-rc_022ce3c7b5e17cf2-227"/>Catálogo de sismicidad histórica general del país. <text:span text:style-name="T4"/></text:p>
          </table:table-cell>
        </table:table-row>
        <table:table-row>
          <table:table-cell table:style-name="Table1.A1" office:value-type="string">
            <text:p text:style-name="P8">Puntos Mapa</text:p>
          </table:table-cell>
          <table:table-cell table:style-name="Table1.A1" office:value-type="string">
            <text:p text:style-name="P6"><text:span text:style-name="Source_20_Text"><text:span text:style-name="T2">localidades.csv</text:span></text:span><text:bookmark text:name="p-rc_022ce3c7b5e17cf2-228"/><text:span text:style-name="T4"/></text:p>
          </table:table-cell>
          <table:table-cell table:style-name="Table1.A1" office:value-type="string">
            <text:p text:style-name="P6"><text:bookmark text:name="p-rc_022ce3c7b5e17cf2-229"/><text:span text:style-name="T2">Archivo con columnas (</text:span><text:span text:style-name="Source_20_Text"><text:span text:style-name="T2">Nombre</text:span></text:span><text:span text:style-name="T2">, </text:span><text:span text:style-name="Source_20_Text"><text:span text:style-name="T2">Lat</text:span></text:span><text:span text:style-name="T2">, </text:span><text:span text:style-name="Source_20_Text"><text:span text:style-name="T2">Lon</text:span></text:span><text:span text:style-name="T2">) para ubicar ciudades de referencia. </text:span></text:p>
          </table:table-cell>
        </table:table-row>
        <table:table-row>
          <table:table-cell table:style-name="Table1.A1" office:value-type="string">
            <text:p text:style-name="P8">Relieve Raster</text:p>
          </table:table-cell>
          <table:table-cell table:style-name="Table1.A1" office:value-type="string">
            <text:p text:style-name="P6"><text:span text:style-name="Source_20_Text"><text:span text:style-name="T2">NE2_LR_LC_SR_W_DR.tif</text:span></text:span><text:bookmark text:name="p-rc_022ce3c7b5e17cf2-230"/><text:span text:style-name="T4"/></text:p>
          </table:table-cell>
          <table:table-cell table:style-name="Table1.A1" office:value-type="string">
            <text:p text:style-name="P9"><text:bookmark text:name="p-rc_022ce3c7b5e17cf2-231"/>Imagen TIFF del relieve de relieve de la Tierra cargada por Cartopy. <text:span text:style-name="T4"/></text:p>
          </table:table-cell>
        </table:table-row>
        <table:table-row>
          <table:table-cell table:style-name="Table1.A1" office:value-type="string">
            <text:p text:style-name="P8">Grillas locales</text:p>
          </table:table-cell>
          <table:table-cell table:style-name="Table1.A1" office:value-type="string">
            <text:p text:style-name="P6"><text:span text:style-name="Source_20_Text"><text:span text:style-name="T2">./grillas/slabP01.tmp</text:span></text:span><text:span text:style-name="T2"> hasta </text:span><text:span text:style-name="Source_20_Text"><text:span text:style-name="T2">./grillas/slabP13.tmp</text:span></text:span><text:bookmark text:name="p-rc_022ce3c7b5e17cf2-232"/></text:p>
          </table:table-cell>
          <table:table-cell table:style-name="Table1.A1" office:value-type="string">
            <text:p text:style-name="P9"><text:bookmark text:name="p-rc_022ce3c7b5e17cf2-233"/>Coordenadas tridimensionales de los perfiles locales de la Placa de Nazca. <text:span text:style-name="T4"/></text:p>
          </table:table-cell>
        </table:table-row>
        <table:table-row>
          <table:table-cell table:style-name="Table1.A1" office:value-type="string">
            <text:p text:style-name="P8">Topografía local</text:p>
          </table:table-cell>
          <table:table-cell table:style-name="Table1.A1" office:value-type="string">
            <text:p text:style-name="P6"><text:span text:style-name="Source_20_Text"><text:span text:style-name="T2">./grillas/topoP01.tmp</text:span></text:span><text:span text:style-name="T2"> hasta </text:span><text:span text:style-name="Source_20_Text"><text:span text:style-name="T2">./grillas/topoP13.tmp</text:span></text:span><text:bookmark text:name="p-rc_022ce3c7b5e17cf2-234"/></text:p>
          </table:table-cell>
          <table:table-cell table:style-name="Table1.A1" office:value-type="string">
            <text:p text:style-name="P9"><text:bookmark text:name="p-rc_022ce3c7b5e17cf2-235"/>Datos altimétricos correspondientes a cada perfil local. <text:span text:style-name="T4"/></text:p>
          </table:table-cell>
        </table:table-row>
        <table:table-row>
          <table:table-cell table:style-name="Table1.A1" office:value-type="string">
            <text:p text:style-name="P8">Slab Global</text:p>
          </table:table-cell>
          <table:table-cell table:style-name="Table1.A1" office:value-type="string">
            <text:p text:style-name="P6"><text:span text:style-name="Source_20_Text"><text:span text:style-name="T2">./grillas/sam_slab2_dep_02.23.18.xyz</text:span></text:span><text:bookmark text:name="p-rc_022ce3c7b5e17cf2-236"/><text:span text:style-name="T4"/></text:p>
          </table:table-cell>
          <table:table-cell table:style-name="Table1.A1" office:value-type="string">
            <text:p text:style-name="P9"><text:bookmark text:name="p-rc_022ce3c7b5e17cf2-237"/>Base de datos global Slab2 como respaldo de profundidad fuera de zonas locales. <text:span text:style-name="T4"/></text:p>
          </table:table-cell>
        </table:table-row>
      </table:table>
      <text:h text:style-name="P2" text:outline-level="2"><text:soft-page-break/>3. Requerimientos e Instalación en Entornos Debian Nuevos</text:h>
      <text:p text:style-name="P10">Para asegurar un despliegue sin problemas desde cero en cada máquina local, es obligatorio instalar librerías del sistema para el soporte gráfico interactivo, empaquetado de mapas y dependencias del sistema X-Window:</text:p>
      <text:p text:style-name="P10">Bash</text:p>
      <text:p text:style-name="P4"><text:span text:style-name="Source_20_Text"><text:span text:style-name="T2"># 1. Actualizar el sistema e instalar utilidades (incluyendo xterm para el despliegue del log de Bash)</text:span></text:span></text:p>
      <text:p text:style-name="P5"><text:span text:style-name="Source_20_Text"><text:span text:style-name="T2">sudo apt update &amp;&amp; sudo apt install -y python3-pip python3-venv xterm libgeos-dev libproj-dev proj-bin libopenjp2-7</text:span></text:span></text:p>
      <text:p text:style-name="P5"/>
      <text:p text:style-name="P4"><text:span text:style-name="Source_20_Text"><text:span text:style-name="T2"># 2. Configurar el entorno virtual del proyecto</text:span></text:span></text:p>
      <text:p text:style-name="P5"><text:span text:style-name="Source_20_Text"><text:span text:style-name="T2">python3 -m venv env_newpt</text:span></text:span></text:p>
      <text:p text:style-name="P4"><text:span text:style-name="Source_20_Text"><text:span text:style-name="T2">source env_newpt/bin/activate</text:span></text:span></text:p>
      <text:p text:style-name="P5"/>
      <text:p text:style-name="P4"><text:span text:style-name="Source_20_Text"><text:span text:style-name="T2"># 3. Actualizar pip e instalar librerías de Python requeridas</text:span></text:span></text:p>
      <text:p text:style-name="P5"><text:span text:style-name="Source_20_Text"><text:span text:style-name="T2">pip install --upgrade pip</text:span></text:span></text:p>
      <text:p text:style-name="P5"><text:span text:style-name="Source_20_Text"><text:span text:style-name="T2">pip install pandas numpy matplotlib cartopy psycopg2-binary adjustText pyperclip pillow.</text:span></text:span></text:p>
      <text:p text:style-name="P5"><text:span text:style-name="Source_20_Text"><text:span text:style-name="T2"/></text:span></text:p>
      <text:h text:style-name="P2" text:outline-level="2">4. Puntos Críticos a Modificar en el Despliegue de Producción</text:h>
      <text:p text:style-name="P10">Debido a que el código contiene referencias de desarrollo locales específicas, se deben verificar o cambiar los siguientes parámetros al compilar el proyecto en las 3 estaciones locales:</text:p>
      <text:list text:style-name="L10">
        <text:list-item>
          <text:p text:style-name="P18">Rutas Absolutas en los Scripts:</text:p>
          <text:list>
            <text:list-item>
              <text:p text:style-name="P24"><text:bookmark text:name="p-rc_022ce3c7b5e17cf2-238"/><text:span text:style-name="T2">En </text:span><text:span text:style-name="Source_20_Text"><text:span text:style-name="T2">consulta_evento.py</text:span></text:span><text:span text:style-name="T2">: Modifica la ruta absoluta </text:span><text:span text:style-name="Source_20_Text"><text:span text:style-name="T2">/home/hriquelmez/Desarrollo/mapasopa/ploteo/evento_data.txt</text:span></text:span><text:span text:style-name="T2"> si el directorio raíz del usuario cambia en las estaciones nuevas. </text:span></text:p>
            </text:list-item>
            <text:list-item>
              <text:p text:style-name="P24"><text:bookmark text:name="p-rc_022ce3c7b5e17cf2-239"/><text:span text:style-name="T2">En </text:span><text:span text:style-name="Source_20_Text"><text:span text:style-name="T2">newpt.sh</text:span></text:span><text:span text:style-name="T2">: Modifica </text:span><text:span text:style-name="Source_20_Text"><text:span text:style-name="T2">DIR_TRABAJO="/home/hriquelmez/Desarrollo/mapasopa/ploteo"</text:span></text:span><text:span text:style-name="T2"> por el directorio correspondiente en producción. </text:span></text:p>
            </text:list-item>
          </text:list>
        </text:list-item>
        <text:list-item>
          <text:p text:style-name="P18">Conexión a Base de Datos:</text:p>
          <text:list>
            <text:list-item>
              <text:p text:style-name="P24"><text:bookmark text:name="p-rc_022ce3c7b5e17cf2-240"/><text:soft-page-break/><text:span text:style-name="T2">Confirma que la IP de adquisición </text:span><text:span text:style-name="Source_20_Text"><text:span text:style-name="T2">10.54.217.69</text:span></text:span><text:span text:style-name="T2"> y las credenciales </text:span><text:span text:style-name="Source_20_Text"><text:span text:style-name="T2">sysop</text:span></text:span><text:span text:style-name="T2"> declaradas en </text:span><text:span text:style-name="Source_20_Text"><text:span text:style-name="T2">consulta_evento.py</text:span></text:span><text:span text:style-name="T2"> sean accesibles por SSH/Red local desde las 3 estaciones nuevas de Debian. </text:span></text:p>
            </text:list-item>
          </text:list>
        </text:list-item>
        <text:list-item>
          <text:p text:style-name="P24"><text:span text:style-name="T3">Controladores Gráficos (</text:span><text:span text:style-name="Source_20_Text"><text:span text:style-name="T3">plt.show</text:span></text:span><text:span text:style-name="T3">):</text:span></text:p>
          <text:list>
            <text:list-item>
              <text:p text:style-name="P24"><text:bookmark text:name="p-rc_022ce3c7b5e17cf2-241"/><text:span text:style-name="T2">Debido a que el script requiere levantar de forma interactiva una ventana para el operador, la variable </text:span><text:span text:style-name="Source_20_Text"><text:span text:style-name="T2">$DISPLAY</text:span></text:span><text:span text:style-name="T2"> debe estar correctamente definida en las máquinas locales para que </text:span><text:span text:style-name="Source_20_Text"><text:span text:style-name="T2">xterm</text:span></text:span><text:span text:style-name="T2"> y </text:span><text:span text:style-name="Source_20_Text"><text:span text:style-name="T2">matplotlib</text:span></text:span><text:span text:style-name="T2"> rendericen los plots sin errores de display. </text:span>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3T19:26:11.718765080</meta:creation-date>
    <dc:date>2026-07-14T13:25:19.911463144</dc:date>
    <meta:editing-duration>PT17H24M58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6" meta:paragraph-count="104" meta:word-count="1160" meta:character-count="8262" meta:non-whitespace-character-count="6897"/>
  </office:meta>
</office:document-meta>
</file>