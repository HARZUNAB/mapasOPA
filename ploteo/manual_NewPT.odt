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8900000392A364CEAC.png" manifest:media-type="image/png"/>
  <manifest:file-entry manifest:full-path="Pictures/10000001000002200000016D8AA88D61.png" manifest:media-type="image/png"/>
  <manifest:file-entry manifest:full-path="Pictures/10000001000003E90000013E1FA80903.png" manifest:media-type="image/png"/>
  <manifest:file-entry manifest:full-path="Pictures/100000010000068C000003A179AFEF31.png" manifest:media-type="image/png"/>
  <manifest:file-entry manifest:full-path="Pictures/100000010000068C000003A1F8A6567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style:font-name="Google Sans"/>
    </style:style>
    <style:style style:name="P2" style:family="paragraph" style:parent-style-name="Heading_20_3">
      <style:paragraph-properties fo:margin-left="0in" fo:margin-right="0in" fo:margin-top="0in" fo:margin-bottom="0.0835in" style:contextual-spacing="false" fo:line-height="114%" fo:text-indent="0in" style:auto-text-indent="false"/>
      <style:text-properties officeooo:paragraph-rsid="001ae64f"/>
    </style:style>
    <style:style style:name="P3" style:family="paragraph" style:parent-style-name="Heading_20_3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4" style:family="paragraph" style:parent-style-name="Quotations">
      <style:paragraph-properties fo:margin-left="0.3937in" fo:margin-right="0.3937in" fo:margin-top="0in" fo:margin-bottom="0.1965in" style:contextual-spacing="false" fo:line-height="114%" fo:text-indent="0in" style:auto-text-indent="false"/>
      <style:text-properties style:font-name="Google Sans Text" officeooo:paragraph-rsid="0019cf66"/>
    </style:style>
    <style:style style:name="P5" style:family="paragraph" style:parent-style-name="Quotations">
      <style:paragraph-properties fo:margin-left="0.3937in" fo:margin-right="0.3937in" fo:margin-top="0in" fo:margin-bottom="0.1965in" style:contextual-spacing="false" fo:line-height="114%" fo:text-align="center" style:justify-single-word="false" fo:text-indent="0in" style:auto-text-indent="false"/>
      <style:text-properties style:font-name="Google Sans Text" officeooo:paragraph-rsid="001c4bbf"/>
    </style:style>
    <style:style style:name="P6" style:family="paragraph" style:parent-style-name="Quotations">
      <style:paragraph-properties fo:margin-left="0.3937in" fo:margin-right="0.3937in" fo:margin-top="0in" fo:margin-bottom="0.1965in" style:contextual-spacing="false" fo:line-height="114%" fo:text-align="center" style:justify-single-word="false" fo:text-indent="0in" style:auto-text-indent="false"/>
      <style:text-properties style:font-name="Google Sans Text" officeooo:paragraph-rsid="0019cf66"/>
    </style:style>
    <style:style style:name="P7" style:family="paragraph" style:parent-style-name="Quotations">
      <style:paragraph-properties fo:margin-left="0.3937in" fo:margin-right="0.3937in" fo:margin-top="0in" fo:margin-bottom="0.1965in" style:contextual-spacing="false" fo:line-height="114%" fo:text-align="center" style:justify-single-word="false" fo:text-indent="0in" style:auto-text-indent="false"/>
      <style:text-properties officeooo:paragraph-rsid="0019cf66"/>
    </style:style>
    <style:style style:name="P8" style:family="paragraph" style:parent-style-name="Quotations">
      <style:paragraph-properties fo:margin-left="0.3937in" fo:margin-right="0.3937in" fo:margin-top="0in" fo:margin-bottom="0.1965in" style:contextual-spacing="false" fo:line-height="114%" fo:text-align="center" style:justify-single-word="false" fo:text-indent="0in" style:auto-text-indent="false"/>
    </style:style>
    <style:style style:name="P9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officeooo:paragraph-rsid="001ae64f"/>
    </style:style>
    <style:style style:name="P10" style:family="paragraph" style:parent-style-name="Text_20_body">
      <style:paragraph-properties fo:margin-left="0in" fo:margin-right="0in" fo:margin-top="0in" fo:margin-bottom="0.0972in" style:contextual-spacing="false" fo:line-height="114%" fo:text-align="justify" style:justify-single-word="false" fo:text-indent="0in" style:auto-text-indent="false"/>
      <style:text-properties style:font-name="Google Sans Text" officeooo:paragraph-rsid="001ae64f"/>
    </style:style>
    <style:style style:name="P11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align="justify" style:justify-single-word="false" fo:text-indent="0in" style:auto-text-indent="false" fo:padding="0in" fo:border="none"/>
      <style:text-properties style:font-name="Google Sans Text"/>
    </style:style>
    <style:style style:name="P12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align="justify" style:justify-single-word="false" fo:text-indent="0in" style:auto-text-indent="false" fo:padding="0in" fo:border="none"/>
      <style:text-properties style:font-name="Google Sans Text"/>
    </style:style>
    <style:style style:name="P13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align="justify" style:justify-single-word="false" fo:text-indent="0in" style:auto-text-indent="false" fo:padding="0in" fo:border="none"/>
      <style:text-properties style:font-name="Google Sans Text"/>
    </style:style>
    <style:style style:name="P14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align="justify" style:justify-single-word="false" fo:text-indent="0in" style:auto-text-indent="false" fo:padding="0in" fo:border="none"/>
      <style:text-properties style:font-name="Google Sans Text"/>
    </style:style>
    <style:style style:name="P15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16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align="justify" style:justify-single-word="false" fo:text-indent="0in" style:auto-text-indent="false" fo:padding="0in" fo:border="none"/>
    </style:style>
    <style:style style:name="P17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align="justify" style:justify-single-word="false" fo:text-indent="0in" style:auto-text-indent="false" fo:padding="0in" fo:border="none"/>
    </style:style>
    <style:style style:name="P18" style:family="paragraph" style:parent-style-name="Text_20_body">
      <style:paragraph-properties fo:margin-left="0in" fo:margin-right="0in" fo:margin-top="0in" fo:margin-bottom="0.0972in" style:contextual-spacing="false" fo:line-height="114%" fo:text-align="justify" style:justify-single-word="false" fo:text-indent="0in" style:auto-text-indent="false" fo:padding="0in" fo:border="none"/>
    </style:style>
    <style:style style:name="P19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align="justify" style:justify-single-word="false" fo:text-indent="0in" style:auto-text-indent="false" fo:padding="0in" fo:border="none"/>
    </style:style>
    <style:style style:name="P20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align="justify" style:justify-single-word="false" fo:text-indent="0in" style:auto-text-indent="false" fo:padding="0in" fo:border="none"/>
    </style:style>
    <style:style style:name="P21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align="justify" style:justify-single-word="false" fo:text-indent="0in" style:auto-text-indent="false" fo:padding="0in" fo:border="none"/>
      <style:text-properties officeooo:paragraph-rsid="001ae64f"/>
    </style:style>
    <style:style style:name="P22" style:family="paragraph" style:parent-style-name="Text_20_body">
      <style:paragraph-properties fo:margin-left="0in" fo:margin-right="0in" fo:margin-top="0in" fo:margin-bottom="0.0972in" style:contextual-spacing="false" fo:line-height="114%" fo:text-align="center" style:justify-single-word="false" fo:text-indent="0in" style:auto-text-indent="false" fo:padding="0in" fo:border="none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fo:font-weight="bold"/>
    </style:style>
    <style:style style:name="T4" style:family="text">
      <style:text-properties style:font-name="Google Sans Text" officeooo:rsid="0019cf66"/>
    </style:style>
    <style:style style:name="T5" style:family="text">
      <style:text-properties style:font-name="Google Sans Text" fo:font-style="italic"/>
    </style:style>
    <style:style style:name="T6" style:family="text">
      <style:text-properties style:font-name="Google Sans"/>
    </style:style>
    <style:style style:name="T7" style:family="text">
      <style:text-properties fo:font-style="italic"/>
    </style:style>
    <style:style style:name="T8" style:family="text">
      <style:text-properties fo:font-style="italic" officeooo:rsid="0019cf66"/>
    </style:style>
    <style:style style:name="T9" style:family="text">
      <style:text-properties officeooo:rsid="001ae64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9">Manual d</text:span>e Operación del Sistema NewPT</text:h>
      <text:p text:style-name="P10"><text:bookmark text:name="p-rc_576bc9f08b1a2577-359"/>Est<text:span text:style-name="T9">e documento </text:span>describe el procedimiento para la visualización de <text:span text:style-name="T9">mapas de planta y perfiles </text:span>mediante la integración <text:span text:style-name="T9">con </text:span><text:span text:style-name="T1">SeisComP (scolv)</text:span> y <text:span text:style-name="T1">NewPT</text:span>.</text:p>
      <text:p text:style-name="P9"/>
      <text:h text:style-name="P2" text:outline-level="3"><text:span text:style-name="T6">Paso 1: Selección del Evento en SeisComP (</text:span><text:span text:style-name="Source_20_Text"><text:span text:style-name="T2">scolv</text:span></text:span><text:span text:style-name="T6">)</text:span></text:h>
      <text:list text:style-name="L1">
        <text:list-item>
          <text:p text:style-name="P16"><text:bookmark text:name="p-rc_576bc9f08b1a2577-360"/><text:span text:style-name="T2">Abra la herramienta de análisis de locaciones de SeisComP (</text:span><text:span text:style-name="Source_20_Text"><text:span text:style-name="T2">scolv</text:span></text:span><text:span text:style-name="T2">) conectada al servidor de adquisición. </text:span></text:p>
        </text:list-item>
        <text:list-item>
          <text:p text:style-name="P11">Diríjase a la pestaña <text:span text:style-name="T1">Events</text:span> (Eventos) para desplegar el listado de sismos recientes procesados por el sistema de manera automática o manual.</text:p>
        </text:list-item>
        <text:list-item>
          <text:p text:style-name="P16"><text:span text:style-name="T2">Seleccione el evento de interés haciendo doble clic sobre su identificador (</text:span><text:span text:style-name="Source_20_Text"><text:span text:style-name="T2">ID</text:span></text:span><text:span text:style-name="T2">) o fila correspondiente para abrir la vista detallada de localización.</text:span></text:p>
        </text:list-item>
      </text:list>
      <text:p text:style-name="P5"><text:span text:style-name="T7">Captura de pantalla de la pestaña general "E</text:span><draw:frame draw:style-name="fr1" draw:name="Image1" text:anchor-type="char" svg:width="6.1374in" svg:height="3.4016in" draw:z-index="0"><draw:image xlink:href="Pictures/100000010000068C000003A1F8A65676.png" xlink:type="simple" xlink:show="embed" xlink:actuate="onLoad" draw:mime-type="image/png"/></draw:frame><text:span text:style-name="T7">vents" en scolv, mostrando el listado de sismos disponibles.</text:span></text:p>
      <text:h text:style-name="P3" text:outline-level="3">Paso 2: Análisis de la Solución y Ejecución de NewPT</text:h>
      <text:list text:style-name="L2">
        <text:list-item>
          <text:p text:style-name="P12">Una vez dentro de la pestaña <text:span text:style-name="T1">Location</text:span> (Localización), verifique los parámetros principales del sismo (tiempo de origen, profundidad, latitud, longitud y fases asociadas).</text:p>
        </text:list-item>
        <text:list-item>
          <text:p text:style-name="P17"><text:bookmark text:name="p-rc_576bc9f08b1a2577-361"/><text:soft-page-break/><text:span text:style-name="T2">En la barra de herramientas inferior izquierda de la interfaz de localización, localice el botón personalizado etiquetado como </text:span><text:span text:style-name="Source_20_Text"><text:span text:style-name="T3">NewPT</text:span></text:span><text:span text:style-name="T2">. </text:span></text:p>
        </text:list-item>
        <text:list-item>
          <text:p text:style-name="P17"><text:bookmark text:name="p-rc_576bc9f08b1a2577-362"/><text:span text:style-name="T2">Haga clic en el botón </text:span><text:span text:style-name="Source_20_Text"><text:span text:style-name="T3">NewPT</text:span></text:span><text:span text:style-name="T2"> para iniciar de manera automática el pipeline de visualización.</text:span></text:p>
        </text:list-item>
      </text:list>
      <text:p text:style-name="P18"><text:span text:style-name="T2"><text:tab/></text:span><text:span text:style-name="T4">Recordar que solo se plotearán eventos que tengan solución preferida.</text:span></text:p>
      <text:p text:style-name="P7"><draw:frame draw:style-name="fr3" draw:name="Image2" text:anchor-type="char" svg:width="6.9252in" svg:height="3.8382in" draw:z-index="1"><draw:image xlink:href="Pictures/100000010000068C000003A179AFEF31.png" xlink:type="simple" xlink:show="embed" xlink:actuate="onLoad" draw:mime-type="image/png"/></draw:frame><text:span text:style-name="T5">Captura de la vista de "Location" en scolv, detallando la sismicidad, estaciones asociadas.</text:span></text:p>
      <text:p text:style-name="P7"><text:span text:style-name="T5"/></text:p>
      <text:p text:style-name="P6"><draw:frame draw:style-name="fr1" draw:name="Image3" text:anchor-type="char" svg:width="6.1374in" svg:height="1.9492in" draw:z-index="2"><draw:image xlink:href="Pictures/10000001000003E90000013E1FA80903.png" xlink:type="simple" xlink:show="embed" xlink:actuate="onLoad" draw:mime-type="image/png"/></draw:frame><text:span text:style-name="T8">U</text:span><text:span text:style-name="T7">bicación del botón "NewPT" en la parte inferior izquierda.</text:span></text:p>
      <text:p text:style-name="P4"><text:span text:style-name="T7"/></text:p>
      <text:h text:style-name="P3" text:outline-level="3"><text:soft-page-break/>Paso 3: Consola de Extracción de Datos en Tiempo Real</text:h>
      <text:list text:style-name="L3">
        <text:list-item>
          <text:p text:style-name="P19"><text:bookmark text:name="p-rc_576bc9f08b1a2577-363"/><text:span text:style-name="T2">Al presionar el botón, se levantará automáticamente una consola de visualización interactiva </text:span><text:span text:style-name="Source_20_Text"><text:span text:style-name="T2">xterm</text:span></text:span><text:span text:style-name="T2"> titulada </text:span><text:span text:style-name="T3">"Procesamiento de Evento - NewPT"</text:span><text:span text:style-name="T2">. </text:span></text:p>
        </text:list-item>
        <text:list-item>
          <text:p text:style-name="P19"><text:bookmark text:name="p-rc_576bc9f08b1a2577-364"/><text:span text:style-name="T2">El script en Bash (</text:span><text:span text:style-name="Source_20_Text"><text:span text:style-name="T2">newpt.sh</text:span></text:span><text:span text:style-name="T2">) cerrará de manera proactiva cualquier visualización previa para liberar memoria del sistema. </text:span></text:p>
        </text:list-item>
        <text:list-item>
          <text:p text:style-name="P13">La consola mostrará en tiempo real el progreso de las siguientes etapas críticas:</text:p>
          <text:list>
            <text:list-item>
              <text:p text:style-name="P19"><text:span text:style-name="Source_20_Text"><text:span text:style-name="T3">=== INICIANDO EXTRACCION DE PARAMETROS ===</text:span></text:span></text:p>
            </text:list-item>
            <text:list-item>
              <text:p text:style-name="P19"><text:bookmark text:name="p-rc_576bc9f08b1a2577-365"/><text:bookmark text:name="p-rc_576bc9f08b1a2577-366"/><text:span text:style-name="Source_20_Text"><text:span text:style-name="T3">[OK] Archivo temporal generado.</text:span></text:span><text:span text:style-name="T2"> (Confirmando la escritura exitosa en </text:span><text:span text:style-name="Source_20_Text"><text:span text:style-name="T2">evento_data.txt</text:span></text:span><text:span text:style-name="T2">) </text:span></text:p>
            </text:list-item>
            <text:list-item>
              <text:p text:style-name="P19"><text:span text:style-name="Source_20_Text"><text:span text:style-name="T3">=== GENERANDO MAPAS ===</text:span></text:span></text:p>
            </text:list-item>
            <text:list-item>
              <text:p text:style-name="P19"><text:bookmark text:name="p-rc_576bc9f08b1a2577-367"/><text:bookmark text:name="p-rc_576bc9f08b1a2577-368"/><text:span text:style-name="Source_20_Text"><text:span text:style-name="T3">[SLAB/TOPO] Perfil óptimo detectado</text:span></text:span><text:span text:style-name="T2"> (Muestra el perfil local seleccionado —ej. P03— y la distancia angular al epicentro). </text:span></text:p>
            </text:list-item>
          </text:list>
        </text:list-item>
      </text:list>
      <text:p text:style-name="P22"><draw:frame draw:style-name="fr2" draw:name="Image4" text:anchor-type="char" svg:width="5.6665in" svg:height="3.802in" draw:z-index="3"><draw:image xlink:href="Pictures/10000001000002200000016D8AA88D61.png" xlink:type="simple" xlink:show="embed" xlink:actuate="onLoad" draw:mime-type="image/png"/></draw:frame><text:span text:style-name="T2"><text:tab/></text:span><text:span text:style-name="T5">Captura de la consola xterm mostrando las salidas en texto del procesamiento exitoso <text:tab/>y la detección del perfil óptimo.</text:span></text:p>
      <text:p text:style-name="P15"><text:span text:style-name="T5"/></text:p>
      <text:h text:style-name="P3" text:outline-level="3"><text:soft-page-break/>Paso 4: Visualización del Contexto Sismotectónico (Interfaz Gráfica)</text:h>
      <text:list text:style-name="L4">
        <text:list-item>
          <text:p text:style-name="P14"><text:bookmark text:name="p-rc_576bc9f08b1a2577-369"/>Tras completar los logs en la consola, se desplegará una ventana emergente de Matplotlib con el análisis sismotectónico del evento actual. </text:p>
        </text:list-item>
        <text:list-item>
          <text:p text:style-name="P14">La interfaz gráfica se compone de dos paneles principales coordinados:</text:p>
          <text:list>
            <text:list-item>
              <text:p text:style-name="P20"><text:bookmark text:name="p-rc_576bc9f08b1a2577-370"/><text:span text:style-name="T3">Panel Izquierdo (Vista en Planta):</text:span><text:span text:style-name="T2"> Muestra el hipocentro del sismo actual (círculo rojo), la sismicidad histórica de fondo (puntos grises), localidades de referencia (</text:span><text:span text:style-name="Source_20_Text"><text:span text:style-name="T2">localidades.csv</text:span></text:span><text:span text:style-name="T2">) y un relieve topográfico de alta resolución de la región chilena. </text:span></text:p>
            </text:list-item>
            <text:list-item>
              <text:p text:style-name="P14"><text:bookmark text:name="p-rc_576bc9f08b1a2577-371"/><text:span text:style-name="T1">Panel Derecho (Perfil Perpendicular):</text:span> Proyecta un corte transversal donde se aprecia la topografía/batimetría en superficie (línea negra superior), la inclinación estimada de la placa de subducción (curva sólida gruesa del Slab local/global) y la profundidad del hipocentro actual junto a la sismicidad histórica en profundidad. </text:p>
            </text:list-item>
          </text:list>
        </text:list-item>
        <text:list-item>
          <text:p text:style-name="P21"><text:bookmark text:name="p-rc_576bc9f08b1a2577-372"/><text:span text:style-name="T2">Puede utilizar las herramientas nativas de Matplotlib (esquina inferior izquierda) para hacer zoom, desplazarse o exportar directamente el gráfico generado a formato de imagen (</text:span><text:span text:style-name="Source_20_Text"><text:span text:style-name="T2">.png</text:span></text:span><text:span text:style-name="T2"> o </text:span><text:span text:style-name="Source_20_Text"><text:span text:style-name="T2">.jpg</text:span></text:span><text:span text:style-name="T2">).</text:span></text:p>
        </text:list-item>
      </text:list>
      <text:p text:style-name="P8"><draw:frame draw:style-name="fr1" draw:name="Image5" text:anchor-type="char" svg:width="6.6291in" svg:height="3.6217in" draw:z-index="4"><draw:image xlink:href="Pictures/100000010000068900000392A364CEAC.png" xlink:type="simple" xlink:show="embed" xlink:actuate="onLoad" draw:mime-type="image/png"/></draw:frame><text:span text:style-name="T5">Captura de pantalla de pantalla completa del operador, mostrando el gráfico interactivo de dos paneles montado sobre la interfaz de SeisComP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14T13:25:28.905358972</meta:creation-date>
    <dc:date>2026-07-14T15:12:17.109946775</dc:date>
    <meta:editing-duration>PT1H20M31S</meta:editing-duration>
    <meta:editing-cycles>2</meta:editing-cycles>
    <meta:generator>LibreOffice/24.2.7.2$Linux_X86_64 LibreOffice_project/420$Build-2</meta:generator>
    <meta:document-statistic meta:table-count="0" meta:image-count="5" meta:object-count="0" meta:page-count="4" meta:paragraph-count="30" meta:word-count="510" meta:character-count="3405" meta:non-whitespace-character-count="2931"/>
  </office:meta>
</office:document-meta>
</file>